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A0000031D7DB68F99.png" manifest:media-type="image/png"/>
  <manifest:file-entry manifest:full-path="Pictures/100000010000034C000000998E4D06F0.png" manifest:media-type="image/png"/>
  <manifest:file-entry manifest:full-path="Pictures/10000001000003E90000032BDDF8F951.png" manifest:media-type="image/png"/>
  <manifest:file-entry manifest:full-path="Pictures/10000001000002AC0000007564F8E52D.png" manifest:media-type="image/png"/>
  <manifest:file-entry manifest:full-path="Pictures/100000010000044D000002EC5892DFD1.png" manifest:media-type="image/png"/>
  <manifest:file-entry manifest:full-path="Pictures/10000001000002E9000000B8AD0E55B3.png" manifest:media-type="image/png"/>
  <manifest:file-entry manifest:full-path="Pictures/10000001000002ED00000350ADE90158.png" manifest:media-type="image/png"/>
  <manifest:file-entry manifest:full-path="Pictures/10000001000001890000007CFCB432F3.png" manifest:media-type="image/png"/>
  <manifest:file-entry manifest:full-path="Pictures/100000010000030B000000BE564049AE.png" manifest:media-type="image/png"/>
  <manifest:file-entry manifest:full-path="Pictures/100000010000019C00000244668A59FA.png" manifest:media-type="image/png"/>
  <manifest:file-entry manifest:full-path="Pictures/10000001000002BE00000292C68AC1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246e5" officeooo:paragraph-rsid="001246e5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1246e5" officeooo:paragraph-rsid="001246e5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3d5dc" officeooo:paragraph-rsid="0013d5d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246e5" officeooo:paragraph-rsid="001246e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d5dc" officeooo:paragraph-rsid="0013d5d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3dd3f" officeooo:paragraph-rsid="0013dd3f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fo:color="#c9211e" loext:opacity="100%" fo:font-size="14pt" fo:font-weight="normal" officeooo:rsid="0013dd3f" officeooo:paragraph-rsid="0013dd3f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03</text:p>
      <text:p text:style-name="P1"/>
      <text:p text:style-name="P4">Ex 1.3:</text:p>
      <text:p text:style-name="P2"/>
      <text:p text:style-name="P2"/>
      <text:p text:style-name="P2"><draw:frame draw:style-name="fr1" draw:name="Image1" text:anchor-type="char" svg:x="0.3634in" svg:y="0.1957in" svg:width="5.85in" svg:height="5.4835in" draw:z-index="0"><draw:image xlink:href="Pictures/10000001000002BE00000292C68AC15C.png" xlink:type="simple" xlink:show="embed" xlink:actuate="onLoad" draw:mime-type="image/png"/></draw:frame></text:p>
      <text:p text:style-name="P2"><draw:frame draw:style-name="fr1" draw:name="Image2" text:anchor-type="char" svg:x="0.1756in" svg:y="0.5665in" svg:width="6.4917in" svg:height="1.5835in" draw:z-index="1"><draw:image xlink:href="Pictures/100000010000030B000000BE564049A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4">LAB TASK 1.4:</text:p>
      <text:p text:style-name="P2"><draw:frame draw:style-name="fr3" draw:name="Image3" text:anchor-type="char" svg:width="6.2417in" svg:height="7.0665in" draw:z-index="2"><draw:image xlink:href="Pictures/10000001000002ED00000350ADE90158.png" xlink:type="simple" xlink:show="embed" xlink:actuate="onLoad" draw:mime-type="image/png"/></draw:frame></text:p>
      <text:p text:style-name="P2"/>
      <text:p text:style-name="P2"/>
      <text:p text:style-name="P2"><draw:frame draw:style-name="fr3" draw:name="Image4" text:anchor-type="char" svg:width="6.2083in" svg:height="1.5335in" draw:z-index="3"><draw:image xlink:href="Pictures/10000001000002E9000000B8AD0E55B3.png" xlink:type="simple" xlink:show="embed" xlink:actuate="onLoad" draw:mime-type="image/png"/></draw:frame></text:p>
      <text:p text:style-name="P5"><text:soft-page-break/>Lab task 2.4:</text:p>
      <text:p text:style-name="P5"/>
      <text:p text:style-name="P5"/>
      <text:p text:style-name="P5"><draw:frame draw:style-name="fr3" draw:name="Image5" text:anchor-type="char" svg:width="7.2717in" svg:height="4.9398in" draw:z-index="4"><draw:image xlink:href="Pictures/100000010000044D000002EC5892DFD1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6" text:anchor-type="char" svg:x="-0.3319in" svg:y="0.0134in" svg:width="7.1866in" svg:height="1.2291in" draw:z-index="5"><draw:image xlink:href="Pictures/10000001000002AC0000007564F8E52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<text:soft-page-break/></text:p>
      <text:p text:style-name="P4"/>
      <text:p text:style-name="P5">Lab Task 3.3 :</text:p>
      <text:p text:style-name="P3"/>
      <text:p text:style-name="P3"><draw:frame draw:style-name="fr2" draw:name="Image7" text:anchor-type="char" svg:width="6.6929in" svg:height="5.422in" draw:z-index="6"><draw:image xlink:href="Pictures/10000001000003E90000032BDDF8F95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8" text:anchor-type="char" svg:x="0.0417in" svg:y="0.2028in" svg:width="6.6929in" svg:height="1.2134in" draw:z-index="7"><draw:image xlink:href="Pictures/100000010000034C000000998E4D06F0.png" xlink:type="simple" xlink:show="embed" xlink:actuate="onLoad" draw:mime-type="image/png"/></draw:frame></text:p>
      <text:p text:style-name="P2"/>
      <text:p text:style-name="P2"/>
      <text:p text:style-name="P2"/>
      <text:p text:style-name="P6"><text:soft-page-break/>Lab Task 4.4:</text:p>
      <text:p text:style-name="P7"><text:s text:c="8"/>.cpp file <text:s text:c="74"/>.h file</text:p>
      <text:p text:style-name="P6"/>
      <text:p text:style-name="P6"><draw:frame draw:style-name="fr1" draw:name="Image9" text:anchor-type="char" svg:x="-0.2201in" svg:y="0in" svg:width="3.4165in" svg:height="6.6417in" draw:z-index="8"><draw:image xlink:href="Pictures/100000010000019A0000031D7DB68F99.png" xlink:type="simple" xlink:show="embed" xlink:actuate="onLoad" draw:mime-type="image/png"/></draw:frame><draw:frame draw:style-name="fr1" draw:name="Image10" text:anchor-type="char" svg:x="3.5299in" svg:y="0.0807in" svg:width="3.4335in" svg:height="4.8335in" draw:z-index="9"><draw:image xlink:href="Pictures/100000010000019C00000244668A59F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1" text:anchor-type="char" svg:x="0.9756in" svg:y="0.55in" svg:width="4.4661in" svg:height="1.4091in" draw:z-index="10"><draw:image xlink:href="Pictures/10000001000001890000007CFCB432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1:56:08.322639959</meta:creation-date>
    <meta:generator>LibreOffice/24.2.7.2$Linux_X86_64 LibreOffice_project/420$Build-2</meta:generator>
    <dc:date>2026-02-10T20:49:46.920054050</dc:date>
    <meta:editing-duration>P1DT7H59M35S</meta:editing-duration>
    <meta:editing-cycles>2</meta:editing-cycles>
    <meta:document-statistic meta:table-count="0" meta:image-count="11" meta:object-count="0" meta:page-count="5" meta:paragraph-count="7" meta:word-count="21" meta:character-count="165" meta:non-whitespace-character-count="69"/>
  </office:meta>
</office:document-meta>
</file>