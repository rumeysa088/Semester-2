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073087C4CBC.png" manifest:media-type="image/png"/>
  <manifest:file-entry manifest:full-path="Pictures/100000010000021E000003640365988A.png" manifest:media-type="image/png"/>
  <manifest:file-entry manifest:full-path="Pictures/10000001000003D0000000A975CE09DB.png" manifest:media-type="image/png"/>
  <manifest:file-entry manifest:full-path="Pictures/100000010000046F0000035DA2B22F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f754" officeooo:paragraph-rsid="0006f75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6f754" officeooo:paragraph-rsid="0006f75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6f754" officeooo:paragraph-rsid="0006f754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9</text:p>
      <text:p text:style-name="P3"/>
      <text:p text:style-name="P3">Task 01:</text:p>
      <text:p text:style-name="P3"/>
      <text:p text:style-name="P3"><draw:frame draw:style-name="fr3" draw:name="Image1" text:anchor-type="char" svg:width="6.6929in" svg:height="5.0772in" draw:z-index="0"><draw:image xlink:href="Pictures/100000010000046F0000035DA2B22F5B.png" xlink:type="simple" xlink:show="embed" xlink:actuate="onLoad" draw:mime-type="image/png"/></draw:frame></text:p>
      <text:p text:style-name="P2"/>
      <text:p text:style-name="P3">Output:</text:p>
      <text:p text:style-name="P2"/>
      <text:p text:style-name="P2"/>
      <text:p text:style-name="P2"><draw:frame draw:style-name="fr1" draw:name="Image2" text:anchor-type="char" svg:x="-0.211in" svg:y="0.1854in" svg:width="7.4638in" svg:height="1.2917in" draw:z-index="1"><draw:image xlink:href="Pictures/10000001000003D0000000A975CE09DB.png" xlink:type="simple" xlink:show="embed" xlink:actuate="onLoad" draw:mime-type="image/png"/></draw:frame></text:p>
      <text:p text:style-name="P2"/>
      <text:p text:style-name="P2"/>
      <text:p text:style-name="P2"/>
      <text:p text:style-name="P3"><text:soft-page-break/></text:p>
      <text:p text:style-name="P3">Task 02:</text:p>
      <text:p text:style-name="P3"/>
      <text:p text:style-name="P3"/>
      <text:p text:style-name="P3"><draw:frame draw:style-name="fr2" draw:name="Image3" text:anchor-type="char" svg:width="4.5165in" svg:height="7.2335in" draw:z-index="2"><draw:image xlink:href="Pictures/100000010000021E000003640365988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Output:</text:p>
      <text:p text:style-name="P3"/>
      <text:p text:style-name="P3"><draw:frame draw:style-name="fr1" draw:name="Image4" text:anchor-type="char" svg:x="0.7634in" svg:y="0.1346in" svg:width="5.1665in" svg:height="0.9583in" draw:z-index="3"><draw:image xlink:href="Pictures/100000010000026C00000073087C4C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23:18:51.265180811</meta:creation-date>
    <dc:date>2026-04-20T23:23:19.294445184</dc:date>
    <meta:editing-duration>PT4M33S</meta:editing-duration>
    <meta:editing-cycles>1</meta:editing-cycles>
    <meta:document-statistic meta:table-count="0" meta:image-count="4" meta:object-count="0" meta:page-count="2" meta:paragraph-count="5" meta:word-count="8" meta:character-count="36" meta:non-whitespace-character-count="33"/>
    <meta:generator>LibreOffice/24.2.7.2$Linux_X86_64 LibreOffice_project/420$Build-2</meta:generator>
  </office:meta>
</office:document-meta>
</file>