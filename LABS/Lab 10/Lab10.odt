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0A000000B1752A0E72.png" manifest:media-type="image/png"/>
  <manifest:file-entry manifest:full-path="Pictures/10000001000003EF0000020307B05BE5.png" manifest:media-type="image/png"/>
  <manifest:file-entry manifest:full-path="Pictures/100000010000037A00000197B5427BBC.png" manifest:media-type="image/png"/>
  <manifest:file-entry manifest:full-path="Pictures/10000001000003C0000002F7C04FFA7C.png" manifest:media-type="image/png"/>
  <manifest:file-entry manifest:full-path="Pictures/100000010000031A000000F348BB8F9D.png" manifest:media-type="image/png"/>
  <manifest:file-entry manifest:full-path="Pictures/10000001000002D2000000BA875DF084.png" manifest:media-type="image/png"/>
  <manifest:file-entry manifest:full-path="Pictures/10000001000002FB000002634D65EB9E.png" manifest:media-type="image/png"/>
  <manifest:file-entry manifest:full-path="Pictures/100000010000025B000000B4A1D88A24.png" manifest:media-type="image/png"/>
  <manifest:file-entry manifest:full-path="Pictures/1000000100000385000000B98D56BD32.png" manifest:media-type="image/png"/>
  <manifest:file-entry manifest:full-path="Pictures/1000000100000297000002D4CECE380B.png" manifest:media-type="image/png"/>
  <manifest:file-entry manifest:full-path="Pictures/10000001000001D5000000B3F9A6FC6F.png" manifest:media-type="image/png"/>
  <manifest:file-entry manifest:full-path="Pictures/100000010000030E000002EC67974BE7.png" manifest:media-type="image/png"/>
  <manifest:file-entry manifest:full-path="Pictures/100000010000028F0000036920BB2C9D.png" manifest:media-type="image/png"/>
  <manifest:file-entry manifest:full-path="Pictures/10000001000001C700000092C11C2DA4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officeooo:rsid="0019faea" officeooo:paragraph-rsid="0019faea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6pt" fo:font-weight="bold" officeooo:rsid="0019faea" officeooo:paragraph-rsid="0019faea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4pt" fo:font-weight="bold" officeooo:rsid="0019faea" officeooo:paragraph-rsid="0019faea" style:font-size-asian="14pt" style:font-weight-asian="bold" style:font-size-complex="14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AB 10</text:p>
      <text:p text:style-name="P2"/>
      <text:p text:style-name="P2"/>
      <text:p text:style-name="P2"/>
      <text:p text:style-name="P3">Exercise 01:</text:p>
      <text:p text:style-name="P3"/>
      <text:p text:style-name="P3"/>
      <text:p text:style-name="P3"/>
      <text:p text:style-name="P3"><draw:frame draw:style-name="fr3" draw:name="Image1" text:anchor-type="char" svg:width="6.6929in" svg:height="3.4228in" draw:z-index="0"><draw:image xlink:href="Pictures/10000001000003EF0000020307B05BE5.png" xlink:type="simple" xlink:show="embed" xlink:actuate="onLoad" draw:mime-type="image/png"/></draw:frame></text:p>
      <text:p text:style-name="P2"/>
      <text:p text:style-name="P2"/>
      <text:p text:style-name="P2"/>
      <text:p text:style-name="P3">Output:</text:p>
      <text:p text:style-name="P3"/>
      <text:p text:style-name="P3"/>
      <text:p text:style-name="P3"><draw:frame draw:style-name="fr1" draw:name="Image2" text:anchor-type="char" svg:x="0.0382in" svg:y="0.1126in" svg:width="6.6165in" svg:height="2.0252in" draw:z-index="1"><draw:image xlink:href="Pictures/100000010000031A000000F348BB8F9D.png" xlink:type="simple" xlink:show="embed" xlink:actuate="onLoad" draw:mime-type="image/png"/></draw:frame></text:p>
      <text:p text:style-name="P3"/>
      <text:p text:style-name="P3"/>
      <text:p text:style-name="P3"/>
      <text:p text:style-name="P3"><text:soft-page-break/>Task 01:</text:p>
      <text:p text:style-name="P3"/>
      <text:p text:style-name="P3"><draw:frame draw:style-name="fr3" draw:name="Image3" text:anchor-type="char" svg:width="6.6929in" svg:height="5.2917in" draw:z-index="2"><draw:image xlink:href="Pictures/10000001000003C0000002F7C04FFA7C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>Output:</text:p>
      <text:p text:style-name="P3"/>
      <text:p text:style-name="P3"><draw:frame draw:style-name="fr1" draw:name="Image4" text:anchor-type="char" svg:x="0.3382in" svg:y="0.2354in" svg:width="6.0165in" svg:height="1.55in" draw:z-index="3"><draw:image xlink:href="Pictures/10000001000002D2000000BA875DF084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><text:soft-page-break/>Exercise 02:</text:p>
      <text:p text:style-name="P3"/>
      <text:p text:style-name="P3"><draw:frame draw:style-name="fr1" draw:name="Image5" text:anchor-type="char" svg:x="0.1673in" svg:y="0.2437in" svg:width="6.3583in" svg:height="5.0917in" draw:z-index="4"><draw:image xlink:href="Pictures/10000001000002FB000002634D65EB9E.png" xlink:type="simple" xlink:show="embed" xlink:actuate="onLoad" draw:mime-type="image/png"/></draw:frame></text:p>
      <text:p text:style-name="P3"/>
      <text:p text:style-name="P3"/>
      <text:p text:style-name="P3"/>
      <text:p text:style-name="P3">Output:</text:p>
      <text:p text:style-name="P3"/>
      <text:p text:style-name="P3"/>
      <text:p text:style-name="P3"/>
      <text:p text:style-name="P3"><draw:frame draw:style-name="fr1" draw:name="Image6" text:anchor-type="char" svg:x="0.6311in" svg:y="0.161in" svg:width="5.0252in" svg:height="1.5in" draw:z-index="5"><draw:image xlink:href="Pictures/100000010000025B000000B4A1D88A24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Task 02:</text:p>
      <text:p text:style-name="P3"/>
      <text:p text:style-name="P3"><draw:frame draw:style-name="fr2" draw:name="Image7" text:anchor-type="char" svg:width="5.4583in" svg:height="7.2752in" draw:z-index="6"><draw:image xlink:href="Pictures/100000010000028F0000036920BB2C9D.png" xlink:type="simple" xlink:show="embed" xlink:actuate="onLoad" draw:mime-type="image/png"/></draw:frame></text:p>
      <text:p text:style-name="P3">Output:</text:p>
      <text:p text:style-name="P3"/>
      <text:p text:style-name="P3"><draw:frame draw:style-name="fr1" draw:name="Image8" text:anchor-type="char" svg:x="1.4508in" svg:y="0.1937in" svg:width="3.7917in" svg:height="1.2165in" draw:z-index="7"><draw:image xlink:href="Pictures/10000001000001C700000092C11C2DA4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>Exercise 03:</text:p>
      <text:p text:style-name="P3"/>
      <text:p text:style-name="P3"><draw:frame draw:style-name="fr1" draw:name="Image9" text:anchor-type="char" svg:x="0in" svg:y="0.3118in" svg:width="6.6929in" svg:height="3.0602in" draw:z-index="8"><draw:image xlink:href="Pictures/100000010000037A00000197B5427BBC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>Output:</text:p>
      <text:p text:style-name="P3"/>
      <text:p text:style-name="P3"/>
      <text:p text:style-name="P3"/>
      <text:p text:style-name="P3"/>
      <text:p text:style-name="P3"><draw:frame draw:style-name="fr1" draw:name="Image10" text:anchor-type="char" svg:x="0.1429in" svg:y="0.0693in" svg:width="6.6929in" svg:height="1.3736in" draw:z-index="9"><draw:image xlink:href="Pictures/1000000100000385000000B98D56BD32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Task 03:</text:p>
      <text:p text:style-name="P3"/>
      <text:p text:style-name="P3"/>
      <text:p text:style-name="P3"><draw:frame draw:style-name="fr2" draw:name="Image11" text:anchor-type="char" svg:width="5.5252in" svg:height="6.0335in" draw:z-index="10"><draw:image xlink:href="Pictures/1000000100000297000002D4CECE380B.png" xlink:type="simple" xlink:show="embed" xlink:actuate="onLoad" draw:mime-type="image/png"/></draw:frame></text:p>
      <text:p text:style-name="P3"/>
      <text:p text:style-name="P3"/>
      <text:p text:style-name="P3">Output:</text:p>
      <text:p text:style-name="P3"/>
      <text:p text:style-name="P3"/>
      <text:p text:style-name="P3"><draw:frame draw:style-name="fr2" draw:name="Image12" text:anchor-type="char" svg:width="3.9083in" svg:height="1.4917in" draw:z-index="11"><draw:image xlink:href="Pictures/10000001000001D5000000B3F9A6FC6F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>Task 04:</text:p>
      <text:p text:style-name="P3"/>
      <text:p text:style-name="P3"/>
      <text:p text:style-name="P3"><draw:frame draw:style-name="fr2" draw:name="Image13" text:anchor-type="char" svg:width="6.5165in" svg:height="6.2335in" draw:z-index="12"><draw:image xlink:href="Pictures/100000010000030E000002EC67974BE7.png" xlink:type="simple" xlink:show="embed" xlink:actuate="onLoad" draw:mime-type="image/png"/></draw:frame></text:p>
      <text:p text:style-name="P3"/>
      <text:p text:style-name="P3">Output:</text:p>
      <text:p text:style-name="P3"/>
      <text:p text:style-name="P3"/>
      <text:p text:style-name="P3"><draw:frame draw:style-name="fr1" draw:name="Image14" text:anchor-type="char" svg:x="1.0874in" svg:y="0.0957in" svg:width="4.35in" svg:height="1.4752in" draw:z-index="13"><draw:image xlink:href="Pictures/100000010000020A000000B1752A0E72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23T19:49:42.970074263</meta:creation-date>
    <dc:date>2026-04-23T20:00:57.354161334</dc:date>
    <meta:editing-duration>PT34S</meta:editing-duration>
    <meta:editing-cycles>1</meta:editing-cycles>
    <meta:generator>LibreOffice/24.2.7.2$Linux_X86_64 LibreOffice_project/420$Build-2</meta:generator>
    <meta:document-statistic meta:table-count="0" meta:image-count="14" meta:object-count="0" meta:page-count="7" meta:paragraph-count="15" meta:word-count="23" meta:character-count="123" meta:non-whitespace-character-count="115"/>
  </office:meta>
</office:document-meta>
</file>