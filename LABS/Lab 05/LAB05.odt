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8000002A11AAD6189.png" manifest:media-type="image/png"/>
  <manifest:file-entry manifest:full-path="Pictures/10000001000001D90000031D1E870686.png" manifest:media-type="image/png"/>
  <manifest:file-entry manifest:full-path="Pictures/100000010000019900000077EEE98435.png" manifest:media-type="image/png"/>
  <manifest:file-entry manifest:full-path="Pictures/100000010000027200000340DE9249BD.png" manifest:media-type="image/png"/>
  <manifest:file-entry manifest:full-path="Pictures/10000001000001E5000003381C4D56EF.png" manifest:media-type="image/png"/>
  <manifest:file-entry manifest:full-path="Pictures/10000000000001BB000000963FDDFCBB.png" manifest:media-type="image/png"/>
  <manifest:file-entry manifest:full-path="Pictures/10000000000002CE00000270E809C21C.png" manifest:media-type="image/png"/>
  <manifest:file-entry manifest:full-path="Pictures/10000000000001C70000007B5C96E68A.png" manifest:media-type="image/png"/>
  <manifest:file-entry manifest:full-path="Pictures/10000000000001300000005CC93164F0.png" manifest:media-type="image/png"/>
  <manifest:file-entry manifest:full-path="Pictures/10000000000001EA00000295E6CDB956.png" manifest:media-type="image/png"/>
  <manifest:file-entry manifest:full-path="Pictures/10000000000001EF00000265F2881169.png" manifest:media-type="image/png"/>
  <manifest:file-entry manifest:full-path="Pictures/1000000000000204000002610B17F3E9.png" manifest:media-type="image/png"/>
  <manifest:file-entry manifest:full-path="Pictures/10000000000001EF0000007ABA2E9DCE.png" manifest:media-type="image/png"/>
  <manifest:file-entry manifest:full-path="Pictures/1000000100000152000000CE01B15C52.png" manifest:media-type="image/png"/>
  <manifest:file-entry manifest:full-path="Pictures/10000000000001C30000008FF8A9B590.png" manifest:media-type="image/png"/>
  <manifest:file-entry manifest:full-path="Pictures/10000000000001CB000000866BBE0E65.png" manifest:media-type="image/png"/>
  <manifest:file-entry manifest:full-path="Pictures/10000000000002B5000002A5042287A0.png" manifest:media-type="image/png"/>
  <manifest:file-entry manifest:full-path="Pictures/10000000000001530000014FD6745A10.png" manifest:media-type="image/png"/>
  <manifest:file-entry manifest:full-path="Pictures/1000000000000194000001BF295B6730.png" manifest:media-type="image/png"/>
  <manifest:file-entry manifest:full-path="Pictures/1000000000000261000001A82069E91F.png" manifest:media-type="image/png"/>
  <manifest:file-entry manifest:full-path="Pictures/100000000000022100000232DFF5B9A6.png" manifest:media-type="image/png"/>
  <manifest:file-entry manifest:full-path="Pictures/10000000000001D200000064263D2E45.png" manifest:media-type="image/png"/>
  <manifest:file-entry manifest:full-path="Pictures/10000000000001B90000019EDF2D8FA0.png" manifest:media-type="image/png"/>
  <manifest:file-entry manifest:full-path="Pictures/10000000000001DA0000006E7D4D9A91.png" manifest:media-type="image/png"/>
  <manifest:file-entry manifest:full-path="Pictures/10000000000001E90000005CA4DDAF50.png" manifest:media-type="image/png"/>
  <manifest:file-entry manifest:full-path="Pictures/10000000000001CA0000012652C16F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officeooo:rsid="00075626" officeooo:paragraph-rsid="00075626" style:font-size-asian="16pt" style:font-size-complex="16pt"/>
    </style:style>
    <style:style style:name="P4" style:family="paragraph" style:parent-style-name="Standard">
      <style:text-properties fo:font-size="16pt" officeooo:rsid="0007bd74" officeooo:paragraph-rsid="0007bd74" style:font-size-asian="16pt" style:font-size-complex="16pt"/>
    </style:style>
    <style:style style:name="P5" style:family="paragraph" style:parent-style-name="Standard">
      <style:text-properties fo:font-size="16pt" officeooo:rsid="000950f7" officeooo:paragraph-rsid="000950f7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07bd7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LAB 05</text:span><text:span text:style-name="T1"/></text:p>
      <text:p text:style-name="Standard" loext:marker-style-name="T2"><text:span text:style-name="T2">EX 1:</text:span><text:span text:style-name="T2"/></text:p>
      <text:p text:style-name="Standard" loext:marker-style-name="T2"><draw:frame draw:style-name="fr3" draw:name="Picture 1" text:anchor-type="as-char" svg:width="6.3437in" svg:height="4.4165in" draw:z-index="0"><draw:image xlink:href="Pictures/1000000000000261000001A82069E91F.png" xlink:type="simple" xlink:show="embed" xlink:actuate="onLoad" draw:mime-type="image/png"/></draw:frame></text:p>
      <text:p text:style-name="P2" loext:marker-style-name="T2"/>
      <text:p text:style-name="P2" loext:marker-style-name="T2"/>
      <text:p text:style-name="Standard" loext:marker-style-name="T2"><text:span text:style-name="T2">Output:</text:span><text:span text:style-name="T2"/></text:p>
      <text:p text:style-name="P2" loext:marker-style-name="T2"/>
      <text:p text:style-name="Standard" loext:marker-style-name="T2"><draw:frame draw:style-name="fr3" draw:name="Picture 2" text:anchor-type="as-char" svg:width="5.5307in" svg:height="1.6146in" draw:z-index="1"><draw:image xlink:href="Pictures/10000000000001CB000000866BBE0E65.png" xlink:type="simple" xlink:show="embed" xlink:actuate="onLoad" draw:mime-type="image/png"/></draw:frame></text:p>
      <text:p text:style-name="Standard" loext:marker-style-name="T2"><text:soft-page-break/><text:span text:style-name="T2">EX 2:</text:span><text:span text:style-name="T2"/></text:p>
      <text:p text:style-name="Standard" loext:marker-style-name="T2"><draw:frame draw:style-name="fr3" draw:name="Picture 3" text:anchor-type="as-char" svg:width="6.5in" svg:height="6.35in" draw:z-index="2"><draw:image xlink:href="Pictures/10000000000002B5000002A5042287A0.png" xlink:type="simple" xlink:show="embed" xlink:actuate="onLoad" draw:mime-type="image/png"/></draw:frame></text:p>
      <text:p text:style-name="Standard" loext:marker-style-name="T2"><text:span text:style-name="T2">Output:</text:span><text:span text:style-name="T2"/></text:p>
      <text:p text:style-name="Standard" loext:marker-style-name="T2"><draw:frame draw:style-name="fr3" draw:name="Picture 4" text:anchor-type="as-char" svg:width="4.698in" svg:height="1.4898in" draw:z-index="3"><draw:image xlink:href="Pictures/10000000000001C30000008FF8A9B590.png" xlink:type="simple" xlink:show="embed" xlink:actuate="onLoad" draw:mime-type="image/png"/></draw:frame></text:p>
      <text:p text:style-name="Standard" loext:marker-style-name="T2"><text:soft-page-break/><text:span text:style-name="T2">Ex 3:</text:span><text:span text:style-name="T2"/></text:p>
      <text:p text:style-name="P2" loext:marker-style-name="T2"/>
      <text:p text:style-name="Standard" loext:marker-style-name="T2"><draw:frame draw:style-name="fr3" draw:name="Picture 5" text:anchor-type="as-char" svg:width="5.0102in" svg:height="4.7555in" draw:z-index="4"><draw:image xlink:href="Pictures/10000000000001530000014FD6745A10.png" xlink:type="simple" xlink:show="embed" xlink:actuate="onLoad" draw:mime-type="image/png"/></draw:frame></text:p>
      <text:p text:style-name="P2" loext:marker-style-name="T2"/>
      <text:p text:style-name="Standard" loext:marker-style-name="T2"><text:span text:style-name="T2">Output:</text:span><text:span text:style-name="T2"/></text:p>
      <text:p text:style-name="P2" loext:marker-style-name="T2"/>
      <text:p text:style-name="P2" loext:marker-style-name="T2"/>
      <text:p text:style-name="Standard" loext:marker-style-name="T2"><draw:frame draw:style-name="fr3" draw:name="Picture 7" text:anchor-type="as-char" svg:width="5.1563in" svg:height="1.2709in" draw:z-index="5"><draw:image xlink:href="Pictures/10000000000001EF0000007ABA2E9DCE.png" xlink:type="simple" xlink:show="embed" xlink:actuate="onLoad" draw:mime-type="image/png"/></draw:frame></text:p>
      <text:p text:style-name="P2" loext:marker-style-name="T2"/>
      <text:p text:style-name="Standard" loext:marker-style-name="T2"><text:soft-page-break/><text:span text:style-name="T2">Ex 4:</text:span><text:span text:style-name="T2"/></text:p>
      <text:p text:style-name="Standard" loext:marker-style-name="T2"><draw:frame draw:style-name="fr3" draw:name="Picture 8" text:anchor-type="as-char" svg:width="4.698in" svg:height="5.198in" draw:z-index="6"><draw:image xlink:href="Pictures/1000000000000194000001BF295B6730.png" xlink:type="simple" xlink:show="embed" xlink:actuate="onLoad" draw:mime-type="image/png"/></draw:frame></text:p>
      <text:p text:style-name="P2" loext:marker-style-name="T2"/>
      <text:p text:style-name="Standard" loext:marker-style-name="T2"><text:span text:style-name="T2">Output:</text:span><text:span text:style-name="T2"/></text:p>
      <text:p text:style-name="P2" loext:marker-style-name="T2"/>
      <text:p text:style-name="Standard" loext:marker-style-name="T2"><draw:frame draw:style-name="fr3" draw:name="Picture 9" text:anchor-type="as-char" svg:width="4.8543in" svg:height="1.0417in" draw:z-index="7"><draw:image xlink:href="Pictures/10000000000001D200000064263D2E45.png" xlink:type="simple" xlink:show="embed" xlink:actuate="onLoad" draw:mime-type="image/png"/></draw:frame></text:p>
      <text:p text:style-name="P2" loext:marker-style-name="T2"/>
      <text:p text:style-name="P2" loext:marker-style-name="T2"/>
      <text:p text:style-name="Standard" loext:marker-style-name="T2"><text:soft-page-break/><text:span text:style-name="T2">Ex 5:</text:span><text:span text:style-name="T2"/></text:p>
      <text:p text:style-name="Standard" loext:marker-style-name="T2"><draw:frame draw:style-name="fr3" draw:name="Picture 10" text:anchor-type="as-char" svg:width="5.5937in" svg:height="5.2516in" draw:z-index="8"><draw:image xlink:href="Pictures/10000000000001B90000019EDF2D8FA0.png" xlink:type="simple" xlink:show="embed" xlink:actuate="onLoad" draw:mime-type="image/png"/></draw:frame></text:p>
      <text:p text:style-name="P2" loext:marker-style-name="T2"/>
      <text:p text:style-name="Standard"><text:span text:style-name="T2">Output:</text:span> </text:p>
      <text:p text:style-name="Standard"/>
      <text:p text:style-name="Standard"/>
      <text:p text:style-name="Standard"><draw:frame draw:style-name="fr3" draw:name="Picture 11" text:anchor-type="as-char" svg:width="6.2563in" svg:height="1.1772in" draw:z-index="9"><draw:image xlink:href="Pictures/10000000000001E90000005CA4DDAF50.png" xlink:type="simple" xlink:show="embed" xlink:actuate="onLoad" draw:mime-type="image/png"/></draw:frame></text:p>
      <text:p text:style-name="P2" loext:marker-style-name="T2"/>
      <text:p text:style-name="Standard" loext:marker-style-name="T2"><text:soft-page-break/><text:span text:style-name="T2">Ex 6:</text:span><text:span text:style-name="T2"/></text:p>
      <text:p text:style-name="Standard" loext:marker-style-name="T2"><draw:frame draw:style-name="fr3" draw:name="Picture 12" text:anchor-type="as-char" svg:width="5.4689in" svg:height="5.6398in" draw:z-index="10"><draw:image xlink:href="Pictures/100000000000022100000232DFF5B9A6.png" xlink:type="simple" xlink:show="embed" xlink:actuate="onLoad" draw:mime-type="image/png"/></draw:frame></text:p>
      <text:p text:style-name="Standard" loext:marker-style-name="T2"><text:span text:style-name="T2">Output:</text:span> <draw:frame draw:style-name="fr3" draw:name="Picture 13" text:anchor-type="as-char" svg:width="4.2917in" svg:height="2.7547in" draw:z-index="11"><draw:image xlink:href="Pictures/10000000000001CA0000012652C16F13.png" xlink:type="simple" xlink:show="embed" xlink:actuate="onLoad" draw:mime-type="image/png"/></draw:frame></text:p>
      <text:p text:style-name="Standard" loext:marker-style-name="T2"><text:soft-page-break/><text:span text:style-name="T2">Task 1:</text:span><text:span text:style-name="T2"/></text:p>
      <text:p text:style-name="Standard" loext:marker-style-name="T2"><draw:frame draw:style-name="fr3" draw:name="Picture 14" text:anchor-type="as-char" svg:width="5.1043in" svg:height="6.8854in" draw:z-index="12"><draw:image xlink:href="Pictures/10000000000001EA00000295E6CDB956.png" xlink:type="simple" xlink:show="embed" xlink:actuate="onLoad" draw:mime-type="image/png"/></draw:frame></text:p>
      <text:p text:style-name="Standard" loext:marker-style-name="T2"><text:span text:style-name="T2">Output:</text:span><text:span text:style-name="T2"/></text:p>
      <text:p text:style-name="Standard" loext:marker-style-name="T2"><draw:frame draw:style-name="fr3" draw:name="Picture 15" text:anchor-type="as-char" svg:width="5.2311in" svg:height="1.1457in" draw:z-index="13"><draw:image xlink:href="Pictures/10000000000001300000005CC93164F0.png" xlink:type="simple" xlink:show="embed" xlink:actuate="onLoad" draw:mime-type="image/png"/></draw:frame></text:p>
      <text:p text:style-name="Standard" loext:marker-style-name="T2"><text:soft-page-break/><text:span text:style-name="T2">Task 2:</text:span><text:span text:style-name="T2"/></text:p>
      <text:p text:style-name="Standard" loext:marker-style-name="T2"><draw:frame draw:style-name="fr3" draw:name="Picture 16" text:anchor-type="as-char" svg:width="5.3752in" svg:height="6.3437in" draw:z-index="14"><draw:image xlink:href="Pictures/1000000000000204000002610B17F3E9.png" xlink:type="simple" xlink:show="embed" xlink:actuate="onLoad" draw:mime-type="image/png"/></draw:frame></text:p>
      <text:p text:style-name="Standard" loext:marker-style-name="T2"><text:span text:style-name="T2">Output:</text:span><text:span text:style-name="T2"/></text:p>
      <text:p text:style-name="P2" loext:marker-style-name="T2"/>
      <text:p text:style-name="Standard" loext:marker-style-name="T2"><draw:frame draw:style-name="fr3" draw:name="Picture 17" text:anchor-type="as-char" svg:width="4.7398in" svg:height="1.2811in" draw:z-index="15"><draw:image xlink:href="Pictures/10000000000001C70000007B5C96E68A.png" xlink:type="simple" xlink:show="embed" xlink:actuate="onLoad" draw:mime-type="image/png"/></draw:frame></text:p>
      <text:p text:style-name="Standard" loext:marker-style-name="T2"><text:soft-page-break/><text:span text:style-name="T2">Task 3:</text:span><text:span text:style-name="T2"/></text:p>
      <text:p text:style-name="Standard" loext:marker-style-name="T2"><draw:frame draw:style-name="fr3" draw:name="Picture 18" text:anchor-type="as-char" svg:width="6.5in" svg:height="5.6492in" draw:z-index="16"><draw:image xlink:href="Pictures/10000000000002CE00000270E809C21C.png" xlink:type="simple" xlink:show="embed" xlink:actuate="onLoad" draw:mime-type="image/png"/></draw:frame></text:p>
      <text:p text:style-name="Standard" loext:marker-style-name="T2"><text:span text:style-name="T2">Output:</text:span><text:span text:style-name="T2"/></text:p>
      <text:p text:style-name="P2" loext:marker-style-name="T2"/>
      <text:p text:style-name="Standard" loext:marker-style-name="T2"><draw:frame draw:style-name="fr3" draw:name="Picture 19" text:anchor-type="as-char" svg:width="5.7189in" svg:height="1.9362in" draw:z-index="17"><draw:image xlink:href="Pictures/10000000000001BB000000963FDDFCBB.png" xlink:type="simple" xlink:show="embed" xlink:actuate="onLoad" draw:mime-type="image/png"/></draw:frame></text:p>
      <text:p text:style-name="Standard" loext:marker-style-name="T2"><text:soft-page-break/><text:span text:style-name="T2">Task 4:</text:span><text:span text:style-name="T2"/></text:p>
      <text:p text:style-name="Standard" loext:marker-style-name="T2"><draw:frame draw:style-name="fr3" draw:name="Picture 21" text:anchor-type="as-char" svg:width="5.1811in" svg:height="6.4165in" draw:z-index="18"><draw:image xlink:href="Pictures/10000000000001EF00000265F2881169.png" xlink:type="simple" xlink:show="embed" xlink:actuate="onLoad" draw:mime-type="image/png"/></draw:frame></text:p>
      <text:p text:style-name="P2" loext:marker-style-name="T2"/>
      <text:p text:style-name="Standard" loext:marker-style-name="T2"><text:span text:style-name="T2">Output:</text:span><text:span text:style-name="T2"/></text:p>
      <text:p text:style-name="Standard" loext:marker-style-name="T2"><draw:frame draw:style-name="fr3" draw:name="Picture 20" text:anchor-type="as-char" svg:width="4.9374in" svg:height="1.1457in" draw:z-index="19"><draw:image xlink:href="Pictures/10000000000001DA0000006E7D4D9A91.png" xlink:type="simple" xlink:show="embed" xlink:actuate="onLoad" draw:mime-type="image/png"/></draw:frame></text:p>
      <text:p text:style-name="P3" loext:marker-style-name="T2"><text:bookmark text:name="_GoBack"/><text:soft-page-break/>Task 05:</text:p>
      <text:p text:style-name="P3" loext:marker-style-name="T2"><draw:frame draw:style-name="fr2" draw:name="Image1" text:anchor-type="char" svg:x="1.0957in" svg:y="-0.0752in" svg:width="4.0417in" svg:height="6.8665in" draw:z-index="20"><draw:image xlink:href="Pictures/10000001000001E5000003381C4D56EF.png" xlink:type="simple" xlink:show="embed" xlink:actuate="onLoad" draw:mime-type="image/png"/></draw:frame></text:p>
      <text:p text:style-name="P3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3" loext:marker-style-name="T2"/>
      <text:p text:style-name="P3" loext:marker-style-name="T2">Output:</text:p>
      <text:p text:style-name="P3" loext:marker-style-name="T2"><draw:frame draw:style-name="fr2" draw:name="Image2" text:anchor-type="char" svg:x="1.3252in" svg:y="0.0319in" svg:width="3.6472in" svg:height="1.061in" draw:z-index="21"><draw:image xlink:href="Pictures/100000010000019900000077EEE98435.png" xlink:type="simple" xlink:show="embed" xlink:actuate="onLoad" draw:mime-type="image/png"/></draw:frame></text:p>
      <text:p text:style-name="P3" loext:marker-style-name="T2"/>
      <text:p text:style-name="P3" loext:marker-style-name="T2"><text:soft-page-break/>Task 6: <text:s text:c="79"/><text:span text:style-name="T3">Output:</text:span></text:p>
      <text:p text:style-name="P4" loext:marker-style-name="T2"><draw:frame draw:style-name="fr2" draw:name="Image4" text:anchor-type="char" svg:x="-0.6043in" svg:y="0.2681in" svg:width="3.9417in" svg:height="6.6417in" draw:z-index="23"><draw:image xlink:href="Pictures/10000001000001D90000031D1E870686.png" xlink:type="simple" xlink:show="embed" xlink:actuate="onLoad" draw:mime-type="image/png"/></draw:frame><draw:frame draw:style-name="fr2" draw:name="Image3" text:anchor-type="char" svg:x="3.7252in" svg:y="0.2429in" svg:width="3.1335in" svg:height="5.6083in" draw:z-index="22"><draw:image xlink:href="Pictures/1000000100000178000002A11AAD6189.png" xlink:type="simple" xlink:show="embed" xlink:actuate="onLoad" draw:mime-type="image/png"/></draw:frame></text:p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><text:soft-page-break/>Task 7:</text:p>
      <text:p text:style-name="P4" loext:marker-style-name="T2"><draw:frame draw:style-name="fr2" draw:name="Image5" text:anchor-type="char" svg:x="0.5in" svg:y="0.0752in" svg:width="5.2165in" svg:height="6.9335in" draw:z-index="24"><draw:image xlink:href="Pictures/100000010000027200000340DE9249BD.png" xlink:type="simple" xlink:show="embed" xlink:actuate="onLoad" draw:mime-type="image/png"/></draw:frame></text:p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5" loext:marker-style-name="T2">Output:</text:p>
      <text:p text:style-name="P5" loext:marker-style-name="T2"><draw:frame draw:style-name="fr1" draw:name="Image6" text:anchor-type="char" svg:width="2.8165in" svg:height="1.7165in" draw:z-index="25"><draw:image xlink:href="Pictures/1000000100000152000000CE01B15C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25</meta:initial-creator>
    <meta:editing-cycles>4</meta:editing-cycles>
    <meta:creation-date>2026-02-16T04:22:00</meta:creation-date>
    <dc:date>2026-02-17T20:47:59.967501009</dc:date>
    <meta:editing-duration>PT1H19M38S</meta:editing-duration>
    <meta:generator>LibreOffice/24.2.7.2$Linux_X86_64 LibreOffice_project/420$Build-2</meta:generator>
    <meta:document-statistic meta:table-count="0" meta:image-count="26" meta:object-count="0" meta:page-count="13" meta:paragraph-count="45" meta:word-count="41" meta:character-count="259" meta:non-whitespace-character-count="163"/>
    <meta:user-defined meta:name="AppVersion">16.0000</meta:user-defined>
    <meta:template xlink:type="simple" xlink:actuate="onRequest" xlink:title="Normal" xlink:href=""/>
  </office:meta>
</office:document-meta>
</file>