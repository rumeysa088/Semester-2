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D0000021A22B607F3.png" manifest:media-type="image/png"/>
  <manifest:file-entry manifest:full-path="Pictures/100000010000025900000299633734CC.png" manifest:media-type="image/png"/>
  <manifest:file-entry manifest:full-path="Pictures/1000000100000297000000E2FDFDADEC.png" manifest:media-type="image/png"/>
  <manifest:file-entry manifest:full-path="Pictures/10000001000002D4000000AEAEA6A06A.png" manifest:media-type="image/png"/>
  <manifest:file-entry manifest:full-path="Pictures/10000001000001DC000000DCE5CAD855.png" manifest:media-type="image/png"/>
  <manifest:file-entry manifest:full-path="Pictures/100000010000023E00000197953041F5.png" manifest:media-type="image/png"/>
  <manifest:file-entry manifest:full-path="Pictures/100000010000033C000000F0F7CB1351.png" manifest:media-type="image/png"/>
  <manifest:file-entry manifest:full-path="Pictures/10000001000002EC00000188249B87DE.png" manifest:media-type="image/png"/>
  <manifest:file-entry manifest:full-path="Pictures/100000010000028E0000012A1BA0DB20.png" manifest:media-type="image/png"/>
  <manifest:file-entry manifest:full-path="Pictures/10000001000003B50000010A5C6F3CEA.png" manifest:media-type="image/png"/>
  <manifest:file-entry manifest:full-path="Pictures/100000010000028D00000177E1C4BC99.png" manifest:media-type="image/png"/>
  <manifest:file-entry manifest:full-path="Pictures/1000000100000299000001613449976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4pt" officeooo:rsid="00131c6a" officeooo:paragraph-rsid="00131c6a" style:font-size-asian="14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fo:font-size="14pt" officeooo:rsid="00131c6a" officeooo:paragraph-rsid="00131c6a" style:font-size-asian="14pt" style:font-size-complex="14pt"/>
    </style:style>
    <style:style style:name="P4" style:family="paragraph" style:parent-style-name="Standard">
      <style:paragraph-properties fo:margin-top="0.198in" fo:margin-bottom="0.198in" style:contextual-spacing="false" fo:line-height="150%" fo:text-align="start" style:justify-single-word="false"/>
      <style:text-properties fo:font-size="14pt" officeooo:rsid="00131c6a" officeooo:paragraph-rsid="00131c6a" style:font-size-asian="14pt" style:font-size-complex="14pt"/>
    </style:style>
    <style:style style:name="P5" style:family="paragraph" style:parent-style-name="Standard">
      <style:paragraph-properties fo:margin-top="0.198in" fo:margin-bottom="0.198in" style:contextual-spacing="false" fo:line-height="150%" fo:text-align="start" style:justify-single-word="false"/>
      <style:text-properties fo:font-size="14pt" officeooo:rsid="00137174" officeooo:paragraph-rsid="00137174" style:font-size-asian="14pt" style:font-size-complex="14pt"/>
    </style:style>
    <style:style style:name="T1" style:family="text">
      <style:text-properties style:font-name="DejaVu Serif"/>
    </style:style>
    <style:style style:name="T2" style:family="text">
      <style:text-properties style:font-name="DejaVu Serif" fo:font-size="18pt" style:font-size-asian="18pt" style:font-size-complex="18pt"/>
    </style:style>
    <style:style style:name="T3" style:family="text">
      <style:text-properties style:font-name="DejaVu Serif" fo:font-size="18pt" officeooo:rsid="00131c6a" style:font-size-asian="18pt" style:font-size-complex="18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8"/><text:span text:style-name="T2"><text:s/></text:span><text:span text:style-name="T3">LAB 02</text:span><text:span text:style-name="T2"> <text:s text:c="5"/></text:span></text:p>
      <text:p text:style-name="P1"><text:span text:style-name="T2"/></text:p>
      <text:p text:style-name="P2"><text:span text:style-name="T1">Class Task 01:</text:span></text:p>
      <text:p text:style-name="P2"><draw:frame draw:style-name="fr2" draw:name="Image1" text:anchor-type="char" svg:x="0.5756in" svg:y="0.2252in" svg:width="5.5417in" svg:height="2.9417in" draw:z-index="0"><draw:image xlink:href="Pictures/10000001000002990000016134499764.png" xlink:type="simple" xlink:show="embed" xlink:actuate="onLoad" draw:mime-type="image/png"/></draw:frame></text:p>
      <text:p text:style-name="P2"/>
      <text:p text:style-name="P3"><draw:frame draw:style-name="fr3" draw:name="Image2" text:anchor-type="char" svg:width="6.6929in" svg:height="1.8756in" draw:z-index="1"><draw:image xlink:href="Pictures/10000001000003B50000010A5C6F3CEA.png" xlink:type="simple" xlink:show="embed" xlink:actuate="onLoad" draw:mime-type="image/png"/></draw:frame><text:span text:style-name="T1">Class Task 02:</text:span></text:p>
      <text:p text:style-name="P3"><draw:frame draw:style-name="fr1" draw:name="Image3" text:anchor-type="char" svg:width="6.2335in" svg:height="3.2665in" draw:z-index="2"><draw:image xlink:href="Pictures/10000001000002EC00000188249B87DE.png" xlink:type="simple" xlink:show="embed" xlink:actuate="onLoad" draw:mime-type="image/png"/></draw:frame><text:span text:style-name="T1"/></text:p>
      <text:p text:style-name="P4"><draw:frame draw:style-name="fr3" draw:name="Image4" text:anchor-type="char" svg:width="6.6929in" svg:height="1.9398in" draw:z-index="3"><draw:image xlink:href="Pictures/100000010000033C000000F0F7CB1351.png" xlink:type="simple" xlink:show="embed" xlink:actuate="onLoad" draw:mime-type="image/png"/></draw:frame><text:soft-page-break/><text:span text:style-name="T1">Class Task 03:</text:span></text:p>
      <text:p text:style-name="P4"><text:span text:style-name="T1"/></text:p>
      <text:p text:style-name="P4"><draw:frame draw:style-name="fr2" draw:name="Image5" text:anchor-type="char" svg:x="0.2882in" svg:y="-0.2083in" svg:width="5.6835in" svg:height="3.102in" draw:z-index="4"><draw:image xlink:href="Pictures/100000010000023E00000197953041F5.png" xlink:type="simple" xlink:show="embed" xlink:actuate="onLoad" draw:mime-type="image/png"/></draw:frame><text:span text:style-name="T1"/></text:p>
      <text:p text:style-name="P4"><text:span text:style-name="T1"/></text:p>
      <text:p text:style-name="P4"><draw:frame draw:style-name="fr2" draw:name="Image6" text:anchor-type="char" svg:x="1.2547in" svg:y="-0.2335in" svg:width="3.9665in" svg:height="1.8335in" draw:z-index="5"><draw:image xlink:href="Pictures/10000001000001DC000000DCE5CAD855.png" xlink:type="simple" xlink:show="embed" xlink:actuate="onLoad" draw:mime-type="image/png"/></draw:frame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Class Task 04:</text:span></text:p>
      <text:p text:style-name="P5"><draw:frame draw:style-name="fr2" draw:name="Image7" text:anchor-type="char" svg:x="0.6256in" svg:y="1.3083in" svg:width="5.4417in" svg:height="3.1252in" draw:z-index="6"><draw:image xlink:href="Pictures/100000010000028D00000177E1C4BC99.png" xlink:type="simple" xlink:show="embed" xlink:actuate="onLoad" draw:mime-type="image/png"/></draw:frame><text:span text:style-name="T1"/></text:p>
      <text:p text:style-name="P5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2" draw:name="Image8" text:anchor-type="char" svg:x="0.5256in" svg:y="-0.1425in" svg:width="5.5252in" svg:height="1.8835in" draw:z-index="7"><draw:image xlink:href="Pictures/1000000100000297000000E2FDFDADEC.png" xlink:type="simple" xlink:show="embed" xlink:actuate="onLoad" draw:mime-type="image/png"/></draw:frame><text:span text:style-name="T1"/></text:p>
      <text:p text:style-name="P4"><text:soft-page-break/><text:span text:style-name="T1"/></text:p>
      <text:p text:style-name="P5"><text:span text:style-name="T1">Class Task 5:</text:span></text:p>
      <text:p text:style-name="P5"><draw:frame draw:style-name="fr1" draw:name="Image9" text:anchor-type="char" svg:width="5.0083in" svg:height="5.5417in" draw:z-index="8"><draw:image xlink:href="Pictures/100000010000025900000299633734CC.png" xlink:type="simple" xlink:show="embed" xlink:actuate="onLoad" draw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1" draw:name="Image10" text:anchor-type="char" svg:width="6.0335in" svg:height="1.45in" draw:z-index="9"><draw:image xlink:href="Pictures/10000001000002D4000000AEAEA6A06A.png" xlink:type="simple" xlink:show="embed" xlink:actuate="onLoad" draw:mime-type="image/png"/></draw:frame><text:span text:style-name="T1"/></text:p>
      <text:p text:style-name="P4"><text:span text:style-name="T1"/></text:p>
      <text:p text:style-name="P4"><text:soft-page-break/><text:span text:style-name="T1"/></text:p>
      <text:p text:style-name="P5"><text:span text:style-name="T1">Class Task 06:</text:span></text:p>
      <text:p text:style-name="P5"><draw:frame draw:style-name="fr1" draw:name="Image11" text:anchor-type="char" svg:width="4.2417in" svg:height="4.4835in" draw:z-index="10"><draw:image xlink:href="Pictures/10000001000001FD0000021A22B607F3.png" xlink:type="simple" xlink:show="embed" xlink:actuate="onLoad" draw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1" draw:name="Image12" text:anchor-type="char" svg:width="5.45in" svg:height="2.4835in" draw:z-index="11"><draw:image xlink:href="Pictures/100000010000028E0000012A1BA0DB20.png" xlink:type="simple" xlink:show="embed" xlink:actuate="onLoad" draw:mime-type="image/png"/></draw:frame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5T11:28:22.311818715</meta:creation-date>
    <dc:date>2026-02-05T11:42:47.828338968</dc:date>
    <meta:editing-duration>PT4M12S</meta:editing-duration>
    <meta:editing-cycles>1</meta:editing-cycles>
    <meta:document-statistic meta:table-count="0" meta:image-count="12" meta:object-count="0" meta:page-count="5" meta:paragraph-count="7" meta:word-count="20" meta:character-count="104" meta:non-whitespace-character-count="76"/>
    <meta:generator>LibreOffice/24.2.7.2$Linux_X86_64 LibreOffice_project/420$Build-2</meta:generator>
  </office:meta>
</office:document-meta>
</file>