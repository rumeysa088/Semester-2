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3000000B525CD7E6D.png" manifest:media-type="image/png"/>
  <manifest:file-entry manifest:full-path="Pictures/10000001000001710000005CE95CA051.png" manifest:media-type="image/png"/>
  <manifest:file-entry manifest:full-path="Pictures/100000010000024E000000CB80BF2427.png" manifest:media-type="image/png"/>
  <manifest:file-entry manifest:full-path="Pictures/100000010000034B000002D71874F868.png" manifest:media-type="image/png"/>
  <manifest:file-entry manifest:full-path="Pictures/10000001000001E60000035AAB08003A.png" manifest:media-type="image/png"/>
  <manifest:file-entry manifest:full-path="Pictures/1000000100000349000000CFC83EE33C.png" manifest:media-type="image/png"/>
  <manifest:file-entry manifest:full-path="Pictures/10000001000004450000019CE1F6BB56.png" manifest:media-type="image/png"/>
  <manifest:file-entry manifest:full-path="Pictures/100000010000035F000002D54D65A3EC.png" manifest:media-type="image/png"/>
  <manifest:file-entry manifest:full-path="Pictures/100000010000020D000000AF782CA8B7.png" manifest:media-type="image/png"/>
  <manifest:file-entry manifest:full-path="Pictures/10000001000002B20000020FC740808F.png" manifest:media-type="image/png"/>
  <manifest:file-entry manifest:full-path="Pictures/100000010000028E000000B69356311D.png" manifest:media-type="image/png"/>
  <manifest:file-entry manifest:full-path="Pictures/1000000100000291000001A39B1566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4822b" officeooo:paragraph-rsid="0004822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4822b" officeooo:paragraph-rsid="0004822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559ed" officeooo:paragraph-rsid="000559e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6fc91" officeooo:paragraph-rsid="0006fc91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898bd" officeooo:paragraph-rsid="000898b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8a1aa" officeooo:paragraph-rsid="0008a1aa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0a560e" officeooo:paragraph-rsid="000a560e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7</text:p>
      <text:p text:style-name="P2"/>
      <text:p text:style-name="P2"/>
      <text:p text:style-name="P2"/>
      <text:p text:style-name="P2">Ex 1:</text:p>
      <text:p text:style-name="P2"/>
      <text:p text:style-name="P2"/>
      <text:p text:style-name="P2"/>
      <text:p text:style-name="P2"><draw:frame draw:style-name="fr3" draw:name="Image1" text:anchor-type="char" svg:x="0.8953in" svg:y="0.1283in" svg:width="5.4752in" svg:height="3.4917in" draw:z-index="0"><draw:image xlink:href="Pictures/1000000100000291000001A39B1566B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t: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x="0.739in" svg:y="0.0528in" svg:width="5.45in" svg:height="1.5165in" draw:z-index="1"><draw:image xlink:href="Pictures/100000010000028E000000B69356311D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3">Ex 2:</text:p>
      <text:p text:style-name="P3"/>
      <text:p text:style-name="P3"><draw:frame draw:style-name="fr3" draw:name="Image3" text:anchor-type="char" svg:x="0.4717in" svg:y="0.3193in" svg:width="5.75in" svg:height="4.3917in" draw:z-index="2"><draw:image xlink:href="Pictures/10000001000002B20000020FC74080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Output: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char" svg:x="1.1425in" svg:y="0.0665in" svg:width="4.3752in" svg:height="1.4583in" draw:z-index="3"><draw:image xlink:href="Pictures/100000010000020D000000AF782CA8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>Task 1:</text:p>
      <text:p text:style-name="P4"/>
      <text:p text:style-name="P4"/>
      <text:p text:style-name="P4"/>
      <text:p text:style-name="P4"><draw:frame draw:style-name="fr2" draw:name="Image5" text:anchor-type="char" svg:width="6.6929in" svg:height="2.522in" draw:z-index="4"><draw:image xlink:href="Pictures/10000001000004450000019CE1F6BB56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Output:</text:p>
      <text:p text:style-name="P4"><draw:frame draw:style-name="fr3" draw:name="Image6" text:anchor-type="char" svg:x="0in" svg:y="1.4898in" svg:width="6.6929in" svg:height="1.6472in" draw:z-index="5"><draw:image xlink:href="Pictures/1000000100000349000000CFC83EE3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Task 2:</text:p>
      <text:p text:style-name="P4"/>
      <text:p text:style-name="P4"/>
      <text:p text:style-name="P4"><draw:frame draw:style-name="fr2" draw:name="Image7" text:anchor-type="char" svg:width="6.6929in" svg:height="5.7717in" draw:z-index="6"><draw:image xlink:href="Pictures/100000010000034B000002D71874F868.png" xlink:type="simple" xlink:show="embed" xlink:actuate="onLoad" draw:mime-type="image/png"/></draw:frame></text:p>
      <text:p text:style-name="P5">Output:</text:p>
      <text:p text:style-name="P5"/>
      <text:p text:style-name="P5"/>
      <text:p text:style-name="P4"><draw:frame draw:style-name="fr3" draw:name="Image8" text:anchor-type="char" svg:x="0.7366in" svg:y="0.2047in" svg:width="4.9165in" svg:height="1.6917in" draw:z-index="7"><draw:image xlink:href="Pictures/100000010000024E000000CB80BF24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Task 3:</text:p>
      <text:p text:style-name="P6"><draw:frame draw:style-name="fr1" draw:name="Image9" text:anchor-type="char" svg:width="4.05in" svg:height="7.15in" draw:z-index="8"><draw:image xlink:href="Pictures/10000001000001E60000035AAB08003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Output:</text:p>
      <text:p text:style-name="P6"/>
      <text:p text:style-name="P6"/>
      <text:p text:style-name="P4"/>
      <text:p text:style-name="P4"><draw:frame draw:style-name="fr3" draw:name="Image10" text:anchor-type="char" svg:x="1.6917in" svg:y="0.1146in" svg:width="3.0752in" svg:height="0.7665in" draw:z-index="9"><draw:image xlink:href="Pictures/10000001000001710000005CE95CA05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Task 4:</text:p>
      <text:p text:style-name="P7"><draw:frame draw:style-name="fr2" draw:name="Image11" text:anchor-type="char" svg:width="6.6929in" svg:height="5.622in" draw:z-index="10"><draw:image xlink:href="Pictures/100000010000035F000002D54D65A3EC.png" xlink:type="simple" xlink:show="embed" xlink:actuate="onLoad" draw:mime-type="image/png"/></draw:frame></text:p>
      <text:p text:style-name="P4"/>
      <text:p text:style-name="P7">Output:</text:p>
      <text:p text:style-name="P7"/>
      <text:p text:style-name="P7"><draw:frame draw:style-name="fr1" draw:name="Image12" text:anchor-type="char" svg:width="5.2252in" svg:height="1.5083in" draw:z-index="11"><draw:image xlink:href="Pictures/1000000100000273000000B525CD7E6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3:54:47.009069340</meta:creation-date>
    <dc:date>2026-03-11T15:13:17.642498595</dc:date>
    <meta:editing-duration>PT1M18S</meta:editing-duration>
    <meta:editing-cycles>1</meta:editing-cycles>
    <meta:document-statistic meta:table-count="0" meta:image-count="12" meta:object-count="0" meta:page-count="7" meta:paragraph-count="13" meta:word-count="20" meta:character-count="86" meta:non-whitespace-character-count="79"/>
    <meta:generator>LibreOffice/24.2.7.2$Linux_X86_64 LibreOffice_project/420$Build-2</meta:generator>
  </office:meta>
</office:document-meta>
</file>