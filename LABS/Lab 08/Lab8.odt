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C000000AC07AACC97.png" manifest:media-type="image/png"/>
  <manifest:file-entry manifest:full-path="Pictures/100000010000046300000268D97B1E75.png" manifest:media-type="image/png"/>
  <manifest:file-entry manifest:full-path="Pictures/10000001000003CA000002EEA9225DAA.png" manifest:media-type="image/png"/>
  <manifest:file-entry manifest:full-path="Pictures/10000001000002C00000036346DE4207.png" manifest:media-type="image/png"/>
  <manifest:file-entry manifest:full-path="Pictures/10000001000002B2000000CEDA0347B1.png" manifest:media-type="image/png"/>
  <manifest:file-entry manifest:full-path="Pictures/1000000100000178000000B7251A20CD.png" manifest:media-type="image/png"/>
  <manifest:file-entry manifest:full-path="Pictures/10000001000001CD0000008435FFA759.png" manifest:media-type="image/png"/>
  <manifest:file-entry manifest:full-path="Pictures/100000010000016700000092DD2E74DA.png" manifest:media-type="image/png"/>
  <manifest:file-entry manifest:full-path="Pictures/1000000100000121000000A689D66E66.png" manifest:media-type="image/png"/>
  <manifest:file-entry manifest:full-path="Pictures/10000001000004E0000002868DDBB72D.png" manifest:media-type="image/png"/>
  <manifest:file-entry manifest:full-path="Pictures/10000001000002AD000002D6BEF39362.png" manifest:media-type="image/png"/>
  <manifest:file-entry manifest:full-path="Pictures/10000001000003EF00000239BE7689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5c4" officeooo:paragraph-rsid="0018f5c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8f5c4" officeooo:paragraph-rsid="0018f5c4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970e0" officeooo:paragraph-rsid="001970e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08</text:p>
      <text:p text:style-name="P1"/>
      <text:p text:style-name="P1"/>
      <text:p text:style-name="P1"/>
      <text:p text:style-name="P1">Class Task 1:</text:p>
      <text:p text:style-name="P1"/>
      <text:p text:style-name="P1"/>
      <text:p text:style-name="P1"><draw:frame draw:style-name="fr2" draw:name="Image1" text:anchor-type="char" svg:x="-0.05in" svg:y="0.148in" svg:width="6.6929in" svg:height="3.7811in" draw:z-index="0"><draw:image xlink:href="Pictures/10000001000003EF00000239BE768991.png" xlink:type="simple" xlink:show="embed" xlink:actuate="onLoad" draw:mime-type="image/png"/></draw:frame></text:p>
      <text:p text:style-name="P1"/>
      <text:p text:style-name="P1"/>
      <text:p text:style-name="P1">Output:</text:p>
      <text:p text:style-name="P1"/>
      <text:p text:style-name="P1"/>
      <text:p text:style-name="P1"/>
      <text:p text:style-name="P1"><draw:frame draw:style-name="fr2" draw:name="Image2" text:anchor-type="char" svg:x="2.028in" svg:y="0.1909in" svg:width="2.9917in" svg:height="1.2165in" draw:z-index="1"><draw:image xlink:href="Pictures/100000010000016700000092DD2E74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lassTask 2:</text:p>
      <text:p text:style-name="P1"><draw:frame draw:style-name="fr2" draw:name="Image3" text:anchor-type="char" svg:x="0.5429in" svg:y="0.3535in" svg:width="5.7083in" svg:height="6.05in" draw:z-index="2"><draw:image xlink:href="Pictures/10000001000002AD000002D6BEF39362.png" xlink:type="simple" xlink:show="embed" xlink:actuate="onLoad" draw:mime-type="image/png"/></draw:frame></text:p>
      <text:p text:style-name="P1"/>
      <text:p text:style-name="P1"/>
      <text:p text:style-name="P1">Output:</text:p>
      <text:p text:style-name="P1"/>
      <text:p text:style-name="P1"/>
      <text:p text:style-name="P1"/>
      <text:p text:style-name="P1"><draw:frame draw:style-name="fr2" draw:name="Image4" text:anchor-type="char" svg:x="1.6535in" svg:y="0.172in" svg:width="3.1335in" svg:height="1.5252in" draw:z-index="3"><draw:image xlink:href="Pictures/1000000100000178000000B7251A20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lass Task 3:</text:p>
      <text:p text:style-name="P1"/>
      <text:p text:style-name="P1"><draw:frame draw:style-name="fr3" draw:name="Image5" text:anchor-type="char" svg:width="6.6929in" svg:height="5.1752in" draw:z-index="4"><draw:image xlink:href="Pictures/10000001000003CA000002EEA9225D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Output:</text:p>
      <text:p text:style-name="P1"/>
      <text:p text:style-name="P1"/>
      <text:p text:style-name="P1"/>
      <text:p text:style-name="P1"><draw:frame draw:style-name="fr2" draw:name="Image6" text:anchor-type="char" svg:x="1.2492in" svg:y="0.1598in" svg:width="3.8417in" svg:height="1.1in" draw:z-index="5"><draw:image xlink:href="Pictures/10000001000001CD0000008435FFA7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Lab Task 1:</text:p>
      <text:p text:style-name="P1"/>
      <text:p text:style-name="P1"><draw:frame draw:style-name="fr2" draw:name="Image7" text:anchor-type="char" svg:x="0in" svg:y="0.4882in" svg:width="6.6929in" svg:height="3.4638in" draw:z-index="6"><draw:image xlink:href="Pictures/10000001000004E0000002868DDBB7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Output:</text:p>
      <text:p text:style-name="P1"/>
      <text:p text:style-name="P1"><draw:frame draw:style-name="fr2" draw:name="Image8" text:anchor-type="char" svg:x="0.4126in" svg:y="0.9764in" svg:width="5.75in" svg:height="1.7165in" draw:z-index="7"><draw:image xlink:href="Pictures/10000001000002B2000000CEDA0347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Lab Task 2:</text:p>
      <text:p text:style-name="P1"/>
      <text:p text:style-name="P1"/>
      <text:p text:style-name="P1"/>
      <text:p text:style-name="P1"><draw:frame draw:style-name="fr3" draw:name="Image9" text:anchor-type="char" svg:width="6.6929in" svg:height="3.6709in" draw:z-index="8"><draw:image xlink:href="Pictures/100000010000046300000268D97B1E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Output:</text:p>
      <text:p text:style-name="P1"/>
      <text:p text:style-name="P1"/>
      <text:p text:style-name="P1"/>
      <text:p text:style-name="P1"/>
      <text:p text:style-name="P1"><draw:frame draw:style-name="fr2" draw:name="Image10" text:anchor-type="char" svg:x="0.4866in" svg:y="0.1in" svg:width="5.3in" svg:height="1.4335in" draw:z-index="9"><draw:image xlink:href="Pictures/100000010000027C000000AC07AACC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Lab Task 3:</text:p>
      <text:p text:style-name="P1"/>
      <text:p text:style-name="P1"/>
      <text:p text:style-name="P1"><draw:frame draw:style-name="fr1" draw:name="Image11" text:anchor-type="char" svg:width="5.8665in" svg:height="7.2252in" draw:z-index="10"><draw:image xlink:href="Pictures/10000001000002C00000036346DE4207.png" xlink:type="simple" xlink:show="embed" xlink:actuate="onLoad" draw:mime-type="image/png"/></draw:frame></text:p>
      <text:p text:style-name="P3">Output:</text:p>
      <text:p text:style-name="P3"/>
      <text:p text:style-name="P3"><draw:frame draw:style-name="fr1" draw:name="Image12" text:anchor-type="char" svg:width="2.4083in" svg:height="1.3835in" draw:z-index="11"><draw:image xlink:href="Pictures/1000000100000121000000A689D66E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20:58:56.920289369</meta:creation-date>
    <dc:date>2026-04-14T21:11:44.940867385</dc:date>
    <meta:editing-duration>PT1M45S</meta:editing-duration>
    <meta:editing-cycles>1</meta:editing-cycles>
    <meta:document-statistic meta:table-count="0" meta:image-count="12" meta:object-count="0" meta:page-count="7" meta:paragraph-count="13" meta:word-count="25" meta:character-count="119" meta:non-whitespace-character-count="107"/>
    <meta:generator>LibreOffice/24.2.7.2$Linux_X86_64 LibreOffice_project/420$Build-2</meta:generator>
  </office:meta>
</office:document-meta>
</file>