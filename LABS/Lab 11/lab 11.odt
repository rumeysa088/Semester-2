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B000002A7F7F3DE45.png" manifest:media-type="image/png"/>
  <manifest:file-entry manifest:full-path="Pictures/100000010000026300000350137EC4B9.png" manifest:media-type="image/png"/>
  <manifest:file-entry manifest:full-path="Pictures/100000010000034F000000BBFC2A253B.png" manifest:media-type="image/png"/>
  <manifest:file-entry manifest:full-path="Pictures/10000001000002FE000002045C26EECB.png" manifest:media-type="image/png"/>
  <manifest:file-entry manifest:full-path="Pictures/1000000100000342000000D1397C7600.png" manifest:media-type="image/png"/>
  <manifest:file-entry manifest:full-path="Pictures/10000001000003740000007D9699C273.png" manifest:media-type="image/png"/>
  <manifest:file-entry manifest:full-path="Pictures/10000001000002F2000002835F19CFA9.png" manifest:media-type="image/png"/>
  <manifest:file-entry manifest:full-path="Pictures/10000001000002F2000001B006957BB0.png" manifest:media-type="image/png"/>
  <manifest:file-entry manifest:full-path="Pictures/1000000100000301000002815DB54349.png" manifest:media-type="image/png"/>
  <manifest:file-entry manifest:full-path="Pictures/100000010000036100000083F13EBF4B.png" manifest:media-type="image/png"/>
  <manifest:file-entry manifest:full-path="Pictures/10000001000002B3000001CB56E5D9F1.png" manifest:media-type="image/png"/>
  <manifest:file-entry manifest:full-path="Pictures/100000010000043600000113552F47D1.png" manifest:media-type="image/png"/>
  <manifest:file-entry manifest:full-path="Pictures/10000001000001D400000069372EBFE8.png" manifest:media-type="image/png"/>
  <manifest:file-entry manifest:full-path="Pictures/10000001000002F20000028316398487.png" manifest:media-type="image/png"/>
  <manifest:file-entry manifest:full-path="Pictures/100000010000039F0000008FB589164A.png" manifest:media-type="image/png"/>
  <manifest:file-entry manifest:full-path="Pictures/10000001000002A7000002593D3A8017.png" manifest:media-type="image/png"/>
  <manifest:file-entry manifest:full-path="Pictures/10000001000002EE0000033C18D20FE2.png" manifest:media-type="image/png"/>
  <manifest:file-entry manifest:full-path="Pictures/10000001000002BA000001E390BCD3FA.png" manifest:media-type="image/png"/>
  <manifest:file-entry manifest:full-path="Pictures/10000001000003060000035E6047FC6F.png" manifest:media-type="image/png"/>
  <manifest:file-entry manifest:full-path="Pictures/100000010000039F0000008FFF09DE7C.png" manifest:media-type="image/png"/>
  <manifest:file-entry manifest:full-path="Pictures/1000000100000351000002AAE051809C.png" manifest:media-type="image/png"/>
  <manifest:file-entry manifest:full-path="Pictures/10000001000002DA0000033954321A2F.png" manifest:media-type="image/png"/>
  <manifest:file-entry manifest:full-path="Pictures/1000000100000202000002F87C8F45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c53b" officeooo:paragraph-rsid="0019c53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9c53b" officeooo:paragraph-rsid="0019c53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c53b" officeooo:paragraph-rsid="0019c53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a0498" officeooo:paragraph-rsid="001a049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0498" officeooo:paragraph-rsid="001a8e7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1</text:p>
      <text:p text:style-name="P1"/>
      <text:p text:style-name="P3">Ex 01:</text:p>
      <text:p text:style-name="P2"/>
      <text:p text:style-name="P2"/>
      <text:p text:style-name="P2"><draw:frame draw:style-name="fr1" draw:name="Image1" text:anchor-type="char" svg:x="0.5472in" svg:y="0.0252in" svg:width="6.2835in" svg:height="5.3583in" draw:z-index="0"><draw:image xlink:href="Pictures/10000001000002F2000002835F19CFA9.png" xlink:type="simple" xlink:show="embed" xlink:actuate="onLoad" draw:mime-type="image/png"/></draw:frame></text:p>
      <text:p text:style-name="P2"/>
      <text:p text:style-name="P4"><draw:frame draw:style-name="fr1" draw:name="Image13" text:anchor-type="char" svg:x="0in" svg:y="0.9008in" svg:width="6.6929in" svg:height="1.7071in" draw:z-index="12"><draw:image xlink:href="Pictures/100000010000043600000113552F47D1.png" xlink:type="simple" xlink:show="embed" xlink:actuate="onLoad" draw:mime-type="image/png"/></draw:frame>Output:</text:p>
      <text:p text:style-name="P2"/>
      <text:p text:style-name="P2"/>
      <text:p text:style-name="P3"><text:soft-page-break/>Task 01:</text:p>
      <text:p text:style-name="P3"/>
      <text:p text:style-name="P3"><draw:frame draw:style-name="fr5" draw:name="Image2" text:anchor-type="char" svg:width="6.2835in" svg:height="5.3583in" draw:z-index="1"><draw:image xlink:href="Pictures/10000001000002F20000028316398487.png" xlink:type="simple" xlink:show="embed" xlink:actuate="onLoad" draw:mime-type="image/png"/></draw:frame></text:p>
      <text:p text:style-name="P2"/>
      <text:p text:style-name="P2"/>
      <text:p text:style-name="P4">Output:</text:p>
      <text:p text:style-name="P2"/>
      <text:p text:style-name="P2"><draw:frame draw:style-name="fr1" draw:name="Image14" text:anchor-type="char" svg:x="1.4634in" svg:y="0.211in" svg:width="3.9in" svg:height="0.8752in" draw:z-index="14"><draw:image xlink:href="Pictures/10000001000001D400000069372EBFE8.png" xlink:type="simple" xlink:show="embed" xlink:actuate="onLoad" draw:mime-type="image/png"/></draw:frame></text:p>
      <text:p text:style-name="P2"/>
      <text:p text:style-name="P2"><draw:frame draw:style-name="fr1" draw:name="Image13 Copy 1" text:anchor-type="char" svg:x="0.0453in" svg:y="0.7819in" svg:width="6.6929in" svg:height="1.7071in" draw:z-index="13"><draw:image xlink:href="Pictures/100000010000043600000113552F47D1.png" xlink:type="simple" xlink:show="embed" xlink:actuate="onLoad" draw:mime-type="image/png"/></draw:frame></text:p>
      <text:p text:style-name="P2"/>
      <text:p text:style-name="P3"><text:soft-page-break/>EX 02:</text:p>
      <text:p text:style-name="P3"/>
      <text:p text:style-name="P3"><draw:frame draw:style-name="fr5" draw:name="Image3" text:anchor-type="char" svg:width="5.6583in" svg:height="5.0083in" draw:z-index="2"><draw:image xlink:href="Pictures/10000001000002A7000002593D3A8017.png" xlink:type="simple" xlink:show="embed" xlink:actuate="onLoad" draw:mime-type="image/png"/></draw:frame></text:p>
      <text:p text:style-name="P2"/>
      <text:p text:style-name="P4"/>
      <text:p text:style-name="P4"/>
      <text:p text:style-name="P4">Output:</text:p>
      <text:p text:style-name="P2"><draw:frame draw:style-name="fr1" draw:name="Image15" text:anchor-type="char" svg:x="-0.0146in" svg:y="1.0646in" svg:width="6.6929in" svg:height="1.0319in" draw:z-index="15"><draw:image xlink:href="Pictures/100000010000039F0000008FB58916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Task 02:</text:p>
      <text:p text:style-name="P2"/>
      <text:p text:style-name="P2"><draw:frame draw:style-name="fr2" draw:name="Image4" text:anchor-type="char" svg:width="5.8165in" svg:height="4.0252in" draw:z-index="3"><draw:image xlink:href="Pictures/10000001000002BA000001E390BCD3FA.png" xlink:type="simple" xlink:show="embed" xlink:actuate="onLoad" draw:mime-type="image/png"/></draw:frame></text:p>
      <text:p text:style-name="P2"/>
      <text:p text:style-name="P2"/>
      <text:p text:style-name="P4">Output:</text:p>
      <text:p text:style-name="P2"/>
      <text:p text:style-name="P2"/>
      <text:p text:style-name="P2"/>
      <text:p text:style-name="P2"/>
      <text:p text:style-name="P2"><draw:frame draw:style-name="fr3" draw:name="Image16" text:anchor-type="char" svg:width="6.6929in" svg:height="1.0319in" draw:z-index="16"><draw:image xlink:href="Pictures/100000010000039F0000008FFF09DE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/>
      <text:p text:style-name="P3">Ex 03:</text:p>
      <text:p text:style-name="P3"/>
      <text:p text:style-name="P3"/>
      <text:p text:style-name="P3"><draw:frame draw:style-name="fr5" draw:name="Image5" text:anchor-type="char" svg:width="6.25in" svg:height="6.9in" draw:z-index="4"><draw:image xlink:href="Pictures/10000001000002EE0000033C18D20FE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Output:</text:p>
      <text:p text:style-name="P4"/>
      <text:p text:style-name="P4"><draw:frame draw:style-name="fr4" draw:name="Image17" text:anchor-type="char" svg:width="6.6929in" svg:height="5.3764in" draw:z-index="17"><draw:image xlink:href="Pictures/1000000100000351000002AAE051809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03:</text:p>
      <text:p text:style-name="P3"/>
      <text:p text:style-name="P3"><draw:frame draw:style-name="fr5" draw:name="Image6" text:anchor-type="char" svg:width="6.45in" svg:height="7.1835in" draw:z-index="5"><draw:image xlink:href="Pictures/10000001000003060000035E6047FC6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3" text:anchor-type="char" svg:x="1.1236in" svg:y="0.1098in" svg:width="4.2835in" svg:height="6.3335in" draw:z-index="23"><draw:image xlink:href="Pictures/1000000100000202000002F87C8F450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EX 04:</text:p>
      <text:p text:style-name="P3"><draw:frame draw:style-name="fr5" draw:name="Image7" text:anchor-type="char" svg:width="6.4083in" svg:height="5.3417in" draw:z-index="6"><draw:image xlink:href="Pictures/1000000100000301000002815DB54349.png" xlink:type="simple" xlink:show="embed" xlink:actuate="onLoad" draw:mime-type="image/png"/></draw:frame></text:p>
      <text:p text:style-name="P2"/>
      <text:p text:style-name="P5">Output:</text:p>
      <text:p text:style-name="P5"/>
      <text:p text:style-name="P2"><draw:frame draw:style-name="fr3" draw:name="Image18" text:anchor-type="char" svg:width="6.6929in" svg:height="0.9457in" draw:z-index="18"><draw:image xlink:href="Pictures/10000001000003740000007D9699C2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Task 04:</text:p>
      <text:p text:style-name="P3"/>
      <text:p text:style-name="P3"/>
      <text:p text:style-name="P3"><draw:frame draw:style-name="fr1" draw:name="Image8" text:anchor-type="char" svg:x="0.2071in" svg:y="0.1209in" svg:width="5.7583in" svg:height="3.8252in" draw:z-index="7"><draw:image xlink:href="Pictures/10000001000002B3000001CB56E5D9F1.png" xlink:type="simple" xlink:show="embed" xlink:actuate="onLoad" draw:mime-type="image/png"/></draw:frame></text:p>
      <text:p text:style-name="P3"/>
      <text:p text:style-name="P5">Output:</text:p>
      <text:p text:style-name="P3"/>
      <text:p text:style-name="P3"/>
      <text:p text:style-name="P3"><draw:frame draw:style-name="fr4" draw:name="Image19" text:anchor-type="char" svg:width="6.6929in" svg:height="1.6772in" draw:z-index="19"><draw:image xlink:href="Pictures/1000000100000342000000D1397C760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Ex 05:</text:p>
      <text:p text:style-name="P3"/>
      <text:p text:style-name="P3"><draw:frame draw:style-name="fr1" draw:name="Image9" text:anchor-type="char" svg:x="0.1602in" svg:y="0.1417in" svg:width="6.2835in" svg:height="3.6in" draw:z-index="8"><draw:image xlink:href="Pictures/10000001000002F2000001B006957BB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Output: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20" text:anchor-type="char" svg:width="6.6929in" svg:height="1.0134in" draw:z-index="20"><draw:image xlink:href="Pictures/100000010000036100000083F13EBF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Task 05:</text:p>
      <text:p text:style-name="P3"/>
      <text:p text:style-name="P3"><draw:frame draw:style-name="fr5" draw:name="Image10" text:anchor-type="char" svg:width="6.0835in" svg:height="6.8752in" draw:z-index="9"><draw:image xlink:href="Pictures/10000001000002DA0000033954321A2F.png" xlink:type="simple" xlink:show="embed" xlink:actuate="onLoad" draw:mime-type="image/png"/></draw:frame></text:p>
      <text:p text:style-name="P3"><draw:frame draw:style-name="fr1" draw:name="Image21" text:anchor-type="char" svg:x="0.1043in" svg:y="0.9673in" svg:width="6.6929in" svg:height="1.4772in" draw:z-index="21"><draw:image xlink:href="Pictures/100000010000034F000000BBFC2A253B.png" xlink:type="simple" xlink:show="embed" xlink:actuate="onLoad" draw:mime-type="image/png"/></draw:frame></text:p>
      <text:p text:style-name="P5">Output:</text:p>
      <text:p text:style-name="P3"/>
      <text:p text:style-name="P3"/>
      <text:p text:style-name="P3"><text:soft-page-break/>Final Task:</text:p>
      <text:p text:style-name="P3"><draw:frame draw:style-name="fr1" draw:name="Image11" text:anchor-type="char" svg:x="0.8008in" svg:y="0.1264in" svg:width="5.0543in" svg:height="7.0146in" draw:z-index="10"><draw:image xlink:href="Pictures/100000010000026300000350137EC4B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2" text:anchor-type="char" svg:x="0.8008in" svg:y="0.2382in" svg:width="5.3272in" svg:height="3.589in" draw:z-index="11"><draw:image xlink:href="Pictures/10000001000002FE000002045C26EE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Output:</text:p>
      <text:p text:style-name="P2"/>
      <text:p text:style-name="P2"/>
      <text:p text:style-name="P2"><draw:frame draw:style-name="fr2" draw:name="Image22" text:anchor-type="char" svg:width="4.2252in" svg:height="5.6583in" draw:z-index="22"><draw:image xlink:href="Pictures/10000001000001FB000002A7F7F3DE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21:55:55.763484617</meta:creation-date>
    <dc:date>2026-04-28T22:38:08.377937526</dc:date>
    <meta:editing-duration>PT3M15S</meta:editing-duration>
    <meta:editing-cycles>1</meta:editing-cycles>
    <meta:document-statistic meta:table-count="0" meta:image-count="24" meta:object-count="0" meta:page-count="14" meta:paragraph-count="23" meta:word-count="35" meta:character-count="164" meta:non-whitespace-character-count="152"/>
    <meta:generator>LibreOffice/24.2.7.2$Linux_X86_64 LibreOffice_project/420$Build-2</meta:generator>
  </office:meta>
</office:document-meta>
</file>