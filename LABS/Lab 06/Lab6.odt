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C000000FC5F7CCC10.png" manifest:media-type="image/png"/>
  <manifest:file-entry manifest:full-path="Pictures/10000001000002CE00000278EB224E17.png" manifest:media-type="image/png"/>
  <manifest:file-entry manifest:full-path="Pictures/10000001000002F30000027329B43145.png" manifest:media-type="image/png"/>
  <manifest:file-entry manifest:full-path="Pictures/1000000100000296000001E540DA0BE9.png" manifest:media-type="image/png"/>
  <manifest:file-entry manifest:full-path="Pictures/10000001000000DE0000005B32BC0FF9.png" manifest:media-type="image/png"/>
  <manifest:file-entry manifest:full-path="Pictures/1000000100000227000001E3DFC6FA74.png" manifest:media-type="image/png"/>
  <manifest:file-entry manifest:full-path="Pictures/10000001000002870000031B2DA92646.png" manifest:media-type="image/png"/>
  <manifest:file-entry manifest:full-path="Pictures/10000001000002EF00000278ECC4E7E2.png" manifest:media-type="image/png"/>
  <manifest:file-entry manifest:full-path="Pictures/100000010000010F0000007DA0454E2C.png" manifest:media-type="image/png"/>
  <manifest:file-entry manifest:full-path="Pictures/10000001000003D70000023B1667CB49.png" manifest:media-type="image/png"/>
  <manifest:file-entry manifest:full-path="Pictures/10000001000002450000030FBDD300D9.png" manifest:media-type="image/png"/>
  <manifest:file-entry manifest:full-path="Pictures/10000001000000E60000005637041FA5.png" manifest:media-type="image/png"/>
  <manifest:file-entry manifest:full-path="Pictures/10000001000001FC000001852F9D46AC.png" manifest:media-type="image/png"/>
  <manifest:file-entry manifest:full-path="Pictures/100000010000020B000001E21662C6C3.png" manifest:media-type="image/png"/>
  <manifest:file-entry manifest:full-path="Pictures/10000001000001C50000007F6CC03471.png" manifest:media-type="image/png"/>
  <manifest:file-entry manifest:full-path="Pictures/100000010000010200000093C5E51367.png" manifest:media-type="image/png"/>
  <manifest:file-entry manifest:full-path="Pictures/10000001000001BE000000B6614B46DB.png" manifest:media-type="image/png"/>
  <manifest:file-entry manifest:full-path="Pictures/10000001000001D3000000616A4FEF7B.png" manifest:media-type="image/png"/>
  <manifest:file-entry manifest:full-path="Pictures/1000000100000178000000A4A3C70B23.png" manifest:media-type="image/png"/>
  <manifest:file-entry manifest:full-path="Pictures/10000001000001FD0000014F77C9B87A.png" manifest:media-type="image/png"/>
  <manifest:file-entry manifest:full-path="Pictures/100000010000027200000213829D0174.png" manifest:media-type="image/png"/>
  <manifest:file-entry manifest:full-path="Pictures/10000001000000E80000008E1D5BF7C7.png" manifest:media-type="image/png"/>
  <manifest:file-entry manifest:full-path="Pictures/10000001000001A700000083C9C5BA49.png" manifest:media-type="image/png"/>
  <manifest:file-entry manifest:full-path="Pictures/100000010000010E000000721F09C43F.png" manifest:media-type="image/png"/>
  <manifest:file-entry manifest:full-path="Pictures/1000000100000263000002278C406FF7.png" manifest:media-type="image/png"/>
  <manifest:file-entry manifest:full-path="Pictures/100000010000026C000001B93C564219.png" manifest:media-type="image/png"/>
  <manifest:file-entry manifest:full-path="Pictures/10000001000002310000022CD6DE18AD.png" manifest:media-type="image/png"/>
  <manifest:file-entry manifest:full-path="Pictures/10000001000000E90000005FDDF2E645.png" manifest:media-type="image/png"/>
  <manifest:file-entry manifest:full-path="Pictures/100000010000023200000345F994D1C6.png" manifest:media-type="image/png"/>
  <manifest:file-entry manifest:full-path="Pictures/100000010000018A0000008EFE927BBF.png" manifest:media-type="image/png"/>
  <manifest:file-entry manifest:full-path="Pictures/10000001000004250000030D514DFDB3.png" manifest:media-type="image/png"/>
  <manifest:file-entry manifest:full-path="Pictures/10000001000003D70000034F3D61796C.png" manifest:media-type="image/png"/>
  <manifest:file-entry manifest:full-path="Pictures/100000010000016400000096C3583D55.png" manifest:media-type="image/png"/>
  <manifest:file-entry manifest:full-path="Pictures/10000001000002DA0000012D31FCAACE.png" manifest:media-type="image/png"/>
  <manifest:file-entry manifest:full-path="Pictures/10000001000001040000007543191614.png" manifest:media-type="image/png"/>
  <manifest:file-entry manifest:full-path="Pictures/10000001000001EB000000AEA13D1B5B.png" manifest:media-type="image/png"/>
  <manifest:file-entry manifest:full-path="Pictures/10000001000002EF0000027839846976.png" manifest:media-type="image/png"/>
  <manifest:file-entry manifest:full-path="Pictures/1000000100000224000000A2EE20D7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1bfa" officeooo:paragraph-rsid="00021bf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1bfa" officeooo:paragraph-rsid="00021b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14pt" fo:font-weight="bold" officeooo:rsid="00021bfa" officeooo:paragraph-rsid="00021bf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fo:font-weight="bold" officeooo:rsid="0002a3a9" officeooo:paragraph-rsid="0002a3a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2a3a9" officeooo:paragraph-rsid="0002a3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2a3a9" officeooo:paragraph-rsid="0003087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30878" officeooo:paragraph-rsid="0003087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font-weight="bold" officeooo:rsid="00030878" officeooo:paragraph-rsid="0003087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30878" officeooo:paragraph-rsid="00032e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32e15" officeooo:paragraph-rsid="00032e1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fo:font-weight="bold" officeooo:rsid="00032e15" officeooo:paragraph-rsid="00032e15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61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61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04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6</text:p>
      <text:p text:style-name="P1"/>
      <text:p text:style-name="P2">lab task 1:</text:p>
      <text:p text:style-name="P2"><draw:frame text:anchor-type="paragraph" draw:z-index="2" draw:name="Text Frame 1" draw:style-name="gr3" draw:text-style-name="P12" svg:width="7.4835in" svg:height="0.5051in" svg:x="-0.5008in" svg:y="5.111in"><draw:text-box><text:p><text:span text:style-name="T1">Home Task 1: <text:s text:c="117"/>Output:</text:span></text:p></draw:text-box></draw:frame><draw:frame draw:style-name="fr1" draw:name="Image1" text:anchor-type="char" svg:x="-0.5811in" svg:y="0.2874in" svg:width="4.6752in" svg:height="4.6335in" draw:z-index="0"><draw:image xlink:href="Pictures/10000001000002310000022CD6DE18AD.png" xlink:type="simple" xlink:show="embed" xlink:actuate="onLoad" draw:mime-type="image/png"/></draw:frame><draw:frame draw:style-name="fr1" draw:name="Image2" text:anchor-type="char" svg:x="4.1602in" svg:y="0.3291in" svg:width="3.2835in" svg:height="1.1835in" draw:z-index="1"><draw:image xlink:href="Pictures/100000010000018A0000008EFE927BBF.png" xlink:type="simple" xlink:show="embed" xlink:actuate="onLoad" draw:mime-type="image/png"/></draw:frame><draw:frame draw:style-name="fr1" draw:name="Image3" text:anchor-type="char" svg:x="-0.5543in" svg:y="5.2898in" svg:width="5.0917in" svg:height="4.5917in" draw:z-index="3"><draw:image xlink:href="Pictures/1000000100000263000002278C406FF7.png" xlink:type="simple" xlink:show="embed" xlink:actuate="onLoad" draw:mime-type="image/png"/></draw:frame><text:s text:c="93"/>output<draw:frame draw:style-name="fr1" draw:name="Image4" text:anchor-type="char" svg:x="5.0063in" svg:y="7.0028in" svg:width="1.9335in" svg:height="1.1835in" draw:z-index="4"><draw:image xlink:href="Pictures/10000001000000E80000008E1D5BF7C7.png" xlink:type="simple" xlink:show="embed" xlink:actuate="onLoad" draw:mime-type="image/png"/></draw:frame>:</text:p>
      <text:p text:style-name="P3">Lab task 2: <text:s text:c="84"/>Output:</text:p>
      <text:p text:style-name="P2"><draw:frame text:anchor-type="paragraph" draw:z-index="8" draw:name="Text Frame 3" draw:style-name="gr1" draw:text-style-name="P12" svg:width="7.5004in" svg:height="0.3622in" svg:x="-0.3909in" svg:y="4.7591in"><draw:text-box><text:p><text:span text:style-name="T1">Home task 2: <text:s text:c="92"/>Output:</text:span></text:p></draw:text-box></draw:frame><draw:frame draw:style-name="fr1" draw:name="Image5" text:anchor-type="char" svg:x="-0.4228in" svg:y="0.3602in" svg:width="4.3583in" svg:height="4.0165in" draw:z-index="5"><draw:image xlink:href="Pictures/100000010000020B000001E21662C6C3.png" xlink:type="simple" xlink:show="embed" xlink:actuate="onLoad" draw:mime-type="image/png"/></draw:frame><draw:frame draw:style-name="fr1" draw:name="Image6" text:anchor-type="char" svg:x="3.9555in" svg:y="1.0591in" svg:width="3.5252in" svg:height="1.0917in" draw:z-index="6"><draw:image xlink:href="Pictures/10000001000001A700000083C9C5BA49.png" xlink:type="simple" xlink:show="embed" xlink:actuate="onLoad" draw:mime-type="image/png"/></draw:frame><draw:frame draw:style-name="fr1" draw:name="Image7" text:anchor-type="char" svg:x="-0.3736in" svg:y="5.5575in" svg:width="4.2417in" svg:height="2.7917in" draw:z-index="9"><draw:image xlink:href="Pictures/10000001000001FD0000014F77C9B87A.png" xlink:type="simple" xlink:show="embed" xlink:actuate="onLoad" draw:mime-type="image/png"/></draw:frame><draw:frame draw:style-name="fr1" draw:name="Image8" text:anchor-type="char" svg:x="4.4634in" svg:y="6.6591in" svg:width="1.9417in" svg:height="0.7917in" draw:z-index="10"><draw:image xlink:href="Pictures/10000001000000E90000005FDDF2E645.png" xlink:type="simple" xlink:show="embed" xlink:actuate="onLoad" draw:mime-type="image/png"/></draw:frame></text:p>
      <text:p text:style-name="P4">Lab task 3: <text:s text:c="76"/>Output:</text:p>
      <text:p text:style-name="P5"/>
      <text:p text:style-name="P5"><draw:frame draw:style-name="fr1" draw:name="Image9" text:anchor-type="char" svg:x="-0.6134in" svg:y="0.1193in" svg:width="4.2335in" svg:height="3.2417in" draw:z-index="11"><draw:image xlink:href="Pictures/10000001000001FC000001852F9D46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10" text:anchor-type="char" svg:x="4.4291in" svg:y="0.0146in" svg:width="2.1665in" svg:height="0.9752in" draw:z-index="12"><draw:image xlink:href="Pictures/1000000100000104000000754319161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ome task 3: <text:s text:c="72"/>Output:<draw:frame draw:style-name="fr1" draw:name="Image11" text:anchor-type="char" svg:x="-0.4811in" svg:y="1.2709in" svg:width="4.5917in" svg:height="4.0252in" draw:z-index="13"><draw:image xlink:href="Pictures/1000000100000227000001E3DFC6FA74.png" xlink:type="simple" xlink:show="embed" xlink:actuate="onLoad" draw:mime-type="image/png"/></draw:frame><draw:frame draw:style-name="fr1" draw:name="Image12" text:anchor-type="char" svg:x="4.5992in" svg:y="2.5252in" svg:width="2.2583in" svg:height="1.0417in" draw:z-index="14"><draw:image xlink:href="Pictures/100000010000010F0000007DA0454E2C.png" xlink:type="simple" xlink:show="embed" xlink:actuate="onLoad" draw:mime-type="image/png"/></draw:frame></text:p>
      <text:p text:style-name="P4">Lab task 4: <text:s text:c="90"/>Output:</text:p>
      <text:p text:style-name="P5"><draw:frame draw:style-name="fr1" draw:name="Image13" text:anchor-type="char" svg:x="-0.4862in" svg:y="0.1075in" svg:width="5.3917in" svg:height="6.6252in" draw:z-index="15"><draw:image xlink:href="Pictures/10000001000002870000031B2DA9264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x="5.1154in" svg:y="0.1492in" svg:width="2.25in" svg:height="0.95in" draw:z-index="16"><draw:image xlink:href="Pictures/100000010000010E000000721F09C4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Home task 4: <text:s text:c="73"/><draw:frame draw:style-name="fr1" draw:name="Image15" text:anchor-type="char" svg:x="-0.2264in" svg:y="0.4425in" svg:width="6.3701in" svg:height="3.7in" draw:z-index="17"><draw:image xlink:href="Pictures/10000001000003D70000023B1667CB49.png" xlink:type="simple" xlink:show="embed" xlink:actuate="onLoad" draw:mime-type="image/png"/></draw:frame></text:p>
      <text:p text:style-name="P5">Output:</text:p>
      <text:p text:style-name="P5"><draw:frame draw:style-name="fr1" draw:name="Image16" text:anchor-type="char" svg:x="1.2909in" svg:y="0.1091in" svg:width="3.8917in" svg:height="0.8083in" draw:z-index="18"><draw:image xlink:href="Pictures/10000001000001D3000000616A4FEF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-0.5134in" svg:y="0.2909in" svg:width="6.6929in" svg:height="4.9264in" draw:z-index="19"><draw:image xlink:href="Pictures/10000001000004250000030D514DFDB3.png" xlink:type="simple" xlink:show="embed" xlink:actuate="onLoad" draw:mime-type="image/png"/></draw:frame><text:soft-page-break/>Lab task 5: <text:s text:c="89"/></text:p>
      <text:p text:style-name="P6"/>
      <text:p text:style-name="P6"><text:s/>Output:</text:p>
      <text:p text:style-name="P6"><draw:frame draw:style-name="fr1" draw:name="Image18" text:anchor-type="char" svg:x="1.0083in" svg:y="0.028in" svg:width="3.7165in" svg:height="1.5165in" draw:z-index="20"><draw:image xlink:href="Pictures/10000001000001BE000000B6614B46D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Home Task 5: <text:s text:c="77"/></text:p>
      <text:p text:style-name="P6"/>
      <text:p text:style-name="P6"/>
      <text:p text:style-name="P6"/>
      <text:p text:style-name="P6"><draw:frame draw:style-name="fr1" draw:name="Image19" text:anchor-type="char" svg:x="-0.1098in" svg:y="0.0181in" svg:width="6.6929in" svg:height="5.7665in" draw:z-index="21"><draw:image xlink:href="Pictures/10000001000003D70000034F3D61796C.png" xlink:type="simple" xlink:show="embed" xlink:actuate="onLoad" draw:mime-type="image/png"/></draw:frame></text:p>
      <text:p text:style-name="P6"/>
      <text:p text:style-name="P7"><text:s text:c="2"/>Output:</text:p>
      <text:p text:style-name="P7"/>
      <text:p text:style-name="P7"><draw:frame draw:style-name="fr2" draw:name="Image20" text:anchor-type="char" svg:width="4.0917in" svg:height="1.45in" draw:z-index="22"><draw:image xlink:href="Pictures/10000001000001EB000000AEA13D1B5B.png" xlink:type="simple" xlink:show="embed" xlink:actuate="onLoad" draw:mime-type="image/png"/></draw:frame></text:p>
      <text:p text:style-name="P8">Lab Task 6: <text:s text:c="70"/></text:p>
      <text:p text:style-name="P5"><draw:frame draw:style-name="fr1" draw:name="Image21" text:anchor-type="char" svg:x="0.1193in" svg:y="0.1346in" svg:width="5.9835in" svg:height="4.6083in" draw:z-index="23"><draw:image xlink:href="Pictures/10000001000002EF0000027839846976.png" xlink:type="simple" xlink:show="embed" xlink:actuate="onLoad" draw:mime-type="image/png"/></draw:frame></text:p>
      <text:p text:style-name="P7"/>
      <text:p text:style-name="P7"/>
      <text:p text:style-name="P7"/>
      <text:p text:style-name="P7">Output:</text:p>
      <text:p text:style-name="P7"><draw:frame draw:style-name="fr1" draw:name="Image22" text:anchor-type="char" svg:x="1.6362in" svg:y="1.3047in" svg:width="3.1335in" svg:height="1.3665in" draw:z-index="24"><draw:image xlink:href="Pictures/1000000100000178000000A4A3C70B23.png" xlink:type="simple" xlink:show="embed" xlink:actuate="onLoad" draw:mime-type="image/png"/></draw:frame></text:p>
      <text:p text:style-name="P8">Home task 6: </text:p>
      <text:p text:style-name="P7"><draw:frame draw:style-name="fr1" draw:name="Image23" text:anchor-type="char" svg:x="0.2173in" svg:y="0.5555in" svg:width="6.2583in" svg:height="5.2665in" draw:z-index="25"><draw:image xlink:href="Pictures/10000001000002EF00000278ECC4E7E2.png" xlink:type="simple" xlink:show="embed" xlink:actuate="onLoad" draw:mime-type="image/png"/></draw:frame></text:p>
      <text:p text:style-name="P5"/>
      <text:p text:style-name="P5"/>
      <text:p text:style-name="P7">Output:</text:p>
      <text:p text:style-name="P7"/>
      <text:p text:style-name="P7"/>
      <text:p text:style-name="P5"/>
      <text:p text:style-name="P5"><draw:frame draw:style-name="fr2" draw:name="Image24" text:anchor-type="char" svg:width="4.5665in" svg:height="1.35in" draw:z-index="26"><draw:image xlink:href="Pictures/1000000100000224000000A2EE20D7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Lab Task 7:</text:p>
      <text:p text:style-name="P7"><draw:frame draw:style-name="fr1" draw:name="Image25" text:anchor-type="char" svg:x="-0.1654in" svg:y="0.0756in" svg:width="4.6835in" svg:height="6.9752in" draw:z-index="27"><draw:image xlink:href="Pictures/100000010000023200000345F994D1C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Output:</text:p>
      <text:p text:style-name="P7"><draw:frame draw:style-name="fr2" draw:name="Image26" text:anchor-type="char" svg:width="6.0835in" svg:height="2.5083in" draw:z-index="28"><draw:image xlink:href="Pictures/10000001000002DA0000012D31FCAACE.png" xlink:type="simple" xlink:show="embed" xlink:actuate="onLoad" draw:mime-type="image/png"/></draw:frame></text:p>
      <text:p text:style-name="P8">Home Task 7:</text:p>
      <text:p text:style-name="P7"><draw:frame draw:style-name="fr1" draw:name="Image27" text:anchor-type="char" svg:x="0.6543in" svg:y="0.0854in" svg:width="5.2165in" svg:height="4.4252in" draw:z-index="29"><draw:image xlink:href="Pictures/100000010000027200000213829D017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utput:<draw:frame draw:style-name="fr1" draw:name="Image28" text:anchor-type="char" svg:x="1.5437in" svg:y="0.0429in" svg:width="3.7752in" svg:height="1.0583in" draw:z-index="30"><draw:image xlink:href="Pictures/10000001000001C50000007F6CC0347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0"/>
      <text:p text:style-name="P10">Lab Task 8:</text:p>
      <text:p text:style-name="P10"><draw:frame draw:style-name="fr1" draw:name="Image29" text:anchor-type="char" svg:x="-0.5161in" svg:y="0.1098in" svg:width="5.1665in" svg:height="3.6752in" draw:z-index="31"><draw:image xlink:href="Pictures/100000010000026C000001B93C564219.png" xlink:type="simple" xlink:show="embed" xlink:actuate="onLoad" draw:mime-type="image/png"/></draw:frame><text:s text:c="21"/>Output:</text:p>
      <text:p text:style-name="P10"><draw:frame draw:style-name="fr1" draw:name="Image30" text:anchor-type="char" svg:x="5.0398in" svg:y="1.2035in" svg:width="1.85in" svg:height="0.7583in" draw:z-index="32"><draw:image xlink:href="Pictures/10000001000000DE0000005B32BC0FF9.png" xlink:type="simple" xlink:show="embed" xlink:actuate="onLoad" draw:mime-type="image/png"/></draw:frame></text:p>
      <text:p text:style-name="P11">Home Task 8: <text:s text:c="87"/>Output:</text:p>
      <text:p text:style-name="P7"><draw:frame draw:style-name="fr1" draw:name="Image31" text:anchor-type="char" svg:x="-0.5146in" svg:y="0.2189in" svg:width="5.5165in" svg:height="4.0417in" draw:z-index="33"><draw:image xlink:href="Pictures/1000000100000296000001E540DA0BE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2" text:anchor-type="char" svg:x="5.2673in" svg:y="0.1252in" svg:width="1.9165in" svg:height="0.7165in" draw:z-index="34"><draw:image xlink:href="Pictures/10000001000000E60000005637041FA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1" draw:name="Image33" text:anchor-type="char" svg:x="-0.498in" svg:y="0.3327in" svg:width="6.2917in" svg:height="5.2252in" draw:z-index="35"><draw:image xlink:href="Pictures/10000001000002F30000027329B43145.png" xlink:type="simple" xlink:show="embed" xlink:actuate="onLoad" draw:mime-type="image/png"/></draw:frame>Lab Task 9:</text:p>
      <text:p text:style-name="P10"/>
      <text:p text:style-name="P7"/>
      <text:p text:style-name="P7"/>
      <text:p text:style-name="P7"/>
      <text:p text:style-name="P10"><text:s text:c="2"/>Output:</text:p>
      <text:p text:style-name="P7"/>
      <text:p text:style-name="P7"/>
      <text:p text:style-name="P7"><draw:frame draw:style-name="fr1" draw:name="Image34" text:anchor-type="char" svg:x="4.2791in" svg:y="0.1028in" svg:width="2.9665in" svg:height="1.25in" draw:z-index="36"><draw:image xlink:href="Pictures/100000010000016400000096C3583D5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Home task 9: <text:s text:c="96"/></text:p>
      <text:p text:style-name="P10"><draw:frame draw:style-name="fr1" draw:name="Image35" text:anchor-type="char" svg:x="-0.5291in" svg:y="0.0591in" svg:width="5.9835in" svg:height="5.2665in" draw:z-index="37"><draw:image xlink:href="Pictures/10000001000002CE00000278EB224E1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>Output:<draw:frame draw:style-name="fr1" draw:name="Image36" text:anchor-type="char" svg:x="1.8846in" svg:y="1.0402in" svg:width="2.15in" svg:height="1.2252in" draw:z-index="38"><draw:image xlink:href="Pictures/100000010000010200000093C5E51367.png" xlink:type="simple" xlink:show="embed" xlink:actuate="onLoad" draw:mime-type="image/png"/></draw:frame></text:p>
      <text:p text:style-name="P11"><draw:frame text:anchor-type="paragraph" draw:z-index="7" draw:name="Text Frame 2" draw:style-name="gr2" draw:text-style-name="P13" svg:width="7.4669in" svg:height="0.3622in" svg:x="-0.3744in" svg:y="7.9in"><draw:text-box><text:p/></draw:text-box></draw:frame>Final: <text:s text:c="92"/>Output:</text:p>
      <text:p text:style-name="P9"><draw:frame draw:style-name="fr1" draw:name="Image37" text:anchor-type="char" svg:x="-0.2819in" svg:y="0.1937in" svg:width="4.85in" svg:height="6.2752in" draw:z-index="39"><draw:image xlink:href="Pictures/10000001000002450000030FBDD300D9.png" xlink:type="simple" xlink:show="embed" xlink:actuate="onLoad" draw:mime-type="image/png"/></draw:frame><draw:frame draw:style-name="fr1" draw:name="Image38" text:anchor-type="char" svg:x="4.1866in" svg:y="1.7008in" svg:width="3.0335in" svg:height="2.1in" draw:z-index="40"><draw:image xlink:href="Pictures/100000010000016C000000FC5F7CCC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20:05:59.002841927</meta:creation-date>
    <dc:date>2026-03-04T15:09:11.169171229</dc:date>
    <meta:editing-duration>PT13M13S</meta:editing-duration>
    <meta:editing-cycles>2</meta:editing-cycles>
    <meta:generator>LibreOffice/24.2.7.2$Linux_X86_64 LibreOffice_project/420$Build-2</meta:generator>
    <meta:document-statistic meta:table-count="0" meta:image-count="38" meta:object-count="0" meta:page-count="14" meta:paragraph-count="29" meta:word-count="68" meta:character-count="1351" meta:non-whitespace-character-count="281"/>
  </office:meta>
</office:document-meta>
</file>